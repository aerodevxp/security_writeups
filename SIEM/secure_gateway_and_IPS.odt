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A000000B39E3E8F81.png" manifest:media-type="image/png"/>
  <manifest:file-entry manifest:full-path="Pictures/1000000100000441000001307CE71D86.png" manifest:media-type="image/png"/>
  <manifest:file-entry manifest:full-path="Pictures/100000010000037F0000006ACA5D5068.png" manifest:media-type="image/png"/>
  <manifest:file-entry manifest:full-path="Pictures/10000001000003DE000001B24CFFF83E.png" manifest:media-type="image/png"/>
  <manifest:file-entry manifest:full-path="Pictures/100000010000035E00000054B202023E.png" manifest:media-type="image/png"/>
  <manifest:file-entry manifest:full-path="Pictures/100000010000037A000000E46041FAA9.png" manifest:media-type="image/png"/>
  <manifest:file-entry manifest:full-path="Pictures/1000000100000230000000C168456456.png" manifest:media-type="image/png"/>
  <manifest:file-entry manifest:full-path="Pictures/100000010000035E000000542CF9B66D.png" manifest:media-type="image/png"/>
  <manifest:file-entry manifest:full-path="Pictures/1000000100000198000001866DF81529.png" manifest:media-type="image/png"/>
  <manifest:file-entry manifest:full-path="Pictures/100000010000037B00000081996F7214.png" manifest:media-type="image/png"/>
  <manifest:file-entry manifest:full-path="Pictures/100000010000053B0000031C472CBB6E.png" manifest:media-type="image/png"/>
  <manifest:file-entry manifest:full-path="Pictures/10000001000003550000019F617741C5.png" manifest:media-type="image/png"/>
  <manifest:file-entry manifest:full-path="Pictures/1000000100000235000000B9FA7FB610.png" manifest:media-type="image/png"/>
  <manifest:file-entry manifest:full-path="Pictures/10000001000002220000008F2DCC9571.png" manifest:media-type="image/png"/>
  <manifest:file-entry manifest:full-path="Pictures/1000000100000443000000B46D709654.png" manifest:media-type="image/png"/>
  <manifest:file-entry manifest:full-path="Pictures/10000001000004F4000003BB811AADB1.png" manifest:media-type="image/png"/>
  <manifest:file-entry manifest:full-path="Pictures/10000001000002930000010C3E7A209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eam Vera Sans Mono" svg:font-family="'Bitstream Vera Sans Mono'" style:font-family-generic="modern" style:font-pitch="fixed"/>
    <style:font-face style:name="Bitstream Vera Sans Mono1" svg:font-family="'Bitstream Vera Sans Mono'" style:font-adornments="Bold" style:font-family-generic="modern" style:font-pitch="fixed"/>
    <style:font-face style:name="Bitstream Vera Sans Mono2" svg:font-family="'Bitstream Vera Sans Mono'" style:font-adornments="Roman"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itle">
      <style:paragraph-properties fo:line-height="150%"/>
      <style:text-properties style:font-name="Bitstream Vera Sans Mono" officeooo:rsid="001eabe5" officeooo:paragraph-rsid="001eabe5"/>
    </style:style>
    <style:style style:name="P2" style:family="paragraph" style:parent-style-name="Text_20_body">
      <style:paragraph-properties fo:line-height="150%" fo:text-align="center" style:justify-single-word="false"/>
      <style:text-properties style:font-name="Bitstream Vera Sans Mono" officeooo:rsid="0016a50f" officeooo:paragraph-rsid="0016a50f"/>
    </style:style>
    <style:style style:name="P3" style:family="paragraph" style:parent-style-name="Text_20_body">
      <style:paragraph-properties fo:line-height="150%" fo:text-align="center" style:justify-single-word="false"/>
      <style:text-properties fo:font-size="13pt" style:font-size-asian="13pt" style:font-size-complex="13pt"/>
    </style:style>
    <style:style style:name="P4" style:family="paragraph" style:parent-style-name="Text_20_body">
      <style:paragraph-properties fo:line-height="150%" fo:text-align="center" style:justify-single-word="false"/>
      <style:text-properties style:font-name="Bitstream Vera Sans Mono" officeooo:rsid="001eabe5" officeooo:paragraph-rsid="001eabe5"/>
    </style:style>
    <style:style style:name="P5" style:family="paragraph" style:parent-style-name="Text_20_body">
      <style:paragraph-properties fo:line-height="150%" fo:text-align="center" style:justify-single-word="false"/>
      <style:text-properties style:font-name="Bitstream Vera Sans Mono" fo:font-style="italic" officeooo:rsid="001eabe5" officeooo:paragraph-rsid="001eabe5" style:font-style-asian="italic" style:font-style-complex="italic"/>
    </style:style>
    <style:style style:name="P6" style:family="paragraph" style:parent-style-name="Contents_20_Heading">
      <style:paragraph-properties>
        <style:tab-stops>
          <style:tab-stop style:position="17.588cm" style:type="right" style:leader-style="dotted" style:leader-text="."/>
        </style:tab-stops>
      </style:paragraph-properties>
    </style:style>
    <style:style style:name="P7" style:family="paragraph" style:parent-style-name="Contents_20_2">
      <style:paragraph-properties>
        <style:tab-stops>
          <style:tab-stop style:position="17.089cm" style:type="right" style:leader-style="dotted" style:leader-text="."/>
        </style:tab-stops>
      </style:paragraph-properties>
    </style:style>
    <style:style style:name="P8" style:family="paragraph" style:parent-style-name="Contents_20_3">
      <style:paragraph-properties>
        <style:tab-stops>
          <style:tab-stop style:position="16.588cm" style:type="right" style:leader-style="dotted" style:leader-text="."/>
        </style:tab-stops>
      </style:paragraph-properties>
    </style:style>
    <style:style style:name="P9" style:family="paragraph" style:parent-style-name="Heading_20_1">
      <style:paragraph-properties fo:line-height="150%" fo:break-before="page"/>
    </style:style>
    <style:style style:name="P10" style:family="paragraph" style:parent-style-name="Heading_20_2">
      <style:paragraph-properties fo:line-height="150%"/>
      <style:text-properties officeooo:rsid="001a7a8b" officeooo:paragraph-rsid="001a7a8b"/>
    </style:style>
    <style:style style:name="P11" style:family="paragraph" style:parent-style-name="Text_20_body">
      <style:paragraph-properties fo:line-height="150%"/>
    </style:style>
    <style:style style:name="P12" style:family="paragraph" style:parent-style-name="Text_20_body">
      <style:paragraph-properties fo:line-height="150%"/>
      <style:text-properties officeooo:paragraph-rsid="001eabe5"/>
    </style:style>
    <style:style style:name="P13" style:family="paragraph" style:parent-style-name="Text_20_body">
      <style:paragraph-properties fo:line-height="150%"/>
      <style:text-properties officeooo:rsid="00208e2b" officeooo:paragraph-rsid="00208e2b"/>
    </style:style>
    <style:style style:name="P14" style:family="paragraph" style:parent-style-name="Heading_20_1">
      <style:paragraph-properties fo:line-height="150%" fo:break-before="page"/>
      <style:text-properties officeooo:rsid="001a7a8b" officeooo:paragraph-rsid="001a7a8b"/>
    </style:style>
    <style:style style:name="P15" style:family="paragraph" style:parent-style-name="Text_20_body" style:list-style-name="L1">
      <style:paragraph-properties fo:line-height="150%"/>
      <style:text-properties officeooo:rsid="00210775" officeooo:paragraph-rsid="00210775"/>
    </style:style>
    <style:style style:name="P16" style:family="paragraph" style:parent-style-name="Text_20_body" style:list-style-name="L1">
      <style:paragraph-properties fo:line-height="150%"/>
      <style:text-properties officeooo:rsid="0022fbb9" officeooo:paragraph-rsid="0022fbb9"/>
    </style:style>
    <style:style style:name="P17" style:family="paragraph" style:parent-style-name="Text_20_body">
      <style:paragraph-properties fo:line-height="150%"/>
      <style:text-properties officeooo:rsid="00210775" officeooo:paragraph-rsid="00210775"/>
    </style:style>
    <style:style style:name="P18" style:family="paragraph" style:parent-style-name="Text_20_body">
      <style:paragraph-properties fo:line-height="150%"/>
      <style:text-properties officeooo:rsid="0022fbb9" officeooo:paragraph-rsid="003892b8"/>
    </style:style>
    <style:style style:name="P19" style:family="paragraph" style:parent-style-name="Heading_20_2">
      <style:paragraph-properties fo:line-height="150%"/>
      <style:text-properties officeooo:paragraph-rsid="0022fbb9"/>
    </style:style>
    <style:style style:name="P20" style:family="paragraph" style:parent-style-name="Text_20_body">
      <style:paragraph-properties fo:line-height="150%"/>
      <style:text-properties officeooo:paragraph-rsid="0022fbb9"/>
    </style:style>
    <style:style style:name="P21" style:family="paragraph" style:parent-style-name="Text_20_body">
      <style:paragraph-properties fo:line-height="150%"/>
      <style:text-properties officeooo:rsid="0022fbb9" officeooo:paragraph-rsid="0022fbb9"/>
    </style:style>
    <style:style style:name="P22" style:family="paragraph" style:parent-style-name="Text_20_body">
      <style:paragraph-properties fo:line-height="150%"/>
      <style:text-properties officeooo:rsid="00243a19" officeooo:paragraph-rsid="00243a19"/>
    </style:style>
    <style:style style:name="P23" style:family="paragraph" style:parent-style-name="Text_20_body">
      <style:paragraph-properties fo:line-height="150%"/>
      <style:text-properties officeooo:rsid="0024b9ca" officeooo:paragraph-rsid="0024b9ca"/>
    </style:style>
    <style:style style:name="P24" style:family="paragraph" style:parent-style-name="Heading_20_2">
      <style:paragraph-properties fo:line-height="150%"/>
      <style:text-properties officeooo:rsid="0024b9ca" officeooo:paragraph-rsid="0024b9ca"/>
    </style:style>
    <style:style style:name="P25" style:family="paragraph" style:parent-style-name="Text_20_body">
      <style:paragraph-properties fo:line-height="150%"/>
      <style:text-properties officeooo:rsid="002668e2" officeooo:paragraph-rsid="002668e2"/>
    </style:style>
    <style:style style:name="P26" style:family="paragraph" style:parent-style-name="Text_20_body" style:list-style-name="L2">
      <style:paragraph-properties fo:line-height="150%"/>
      <style:text-properties officeooo:rsid="002668e2" officeooo:paragraph-rsid="002668e2"/>
    </style:style>
    <style:style style:name="P27" style:family="paragraph" style:parent-style-name="Text_20_body">
      <style:paragraph-properties fo:line-height="150%"/>
      <style:text-properties officeooo:rsid="00269e4f" officeooo:paragraph-rsid="00269e4f"/>
    </style:style>
    <style:style style:name="P28" style:family="paragraph" style:parent-style-name="Text_20_body">
      <style:paragraph-properties fo:line-height="150%"/>
      <style:text-properties officeooo:rsid="00290c6b" officeooo:paragraph-rsid="00290c6b"/>
    </style:style>
    <style:style style:name="P29" style:family="paragraph" style:parent-style-name="Heading_20_2">
      <style:paragraph-properties fo:line-height="150%" fo:break-before="page"/>
      <style:text-properties officeooo:rsid="00298b24" officeooo:paragraph-rsid="00298b24"/>
    </style:style>
    <style:style style:name="P30" style:family="paragraph" style:parent-style-name="Text_20_body">
      <style:paragraph-properties fo:line-height="150%"/>
      <style:text-properties officeooo:rsid="00298b24" officeooo:paragraph-rsid="00298b24"/>
    </style:style>
    <style:style style:name="P31" style:family="paragraph" style:parent-style-name="Text_20_body">
      <style:paragraph-properties fo:line-height="150%"/>
      <style:text-properties officeooo:rsid="002af1a3" officeooo:paragraph-rsid="002af1a3"/>
    </style:style>
    <style:style style:name="P32" style:family="paragraph" style:parent-style-name="Text_20_body">
      <style:paragraph-properties fo:line-height="150%"/>
      <style:text-properties officeooo:rsid="002b88f4" officeooo:paragraph-rsid="002b88f4"/>
    </style:style>
    <style:style style:name="P33" style:family="paragraph" style:parent-style-name="Text_20_body">
      <style:paragraph-properties fo:line-height="150%"/>
      <style:text-properties officeooo:rsid="002d258c" officeooo:paragraph-rsid="002d258c"/>
    </style:style>
    <style:style style:name="P34" style:family="paragraph" style:parent-style-name="Text_20_body">
      <style:paragraph-properties fo:line-height="150%"/>
      <style:text-properties officeooo:rsid="003044c3" officeooo:paragraph-rsid="003044c3"/>
    </style:style>
    <style:style style:name="P35" style:family="paragraph" style:parent-style-name="Text_20_body">
      <style:paragraph-properties fo:line-height="150%"/>
      <style:text-properties officeooo:rsid="003493ae" officeooo:paragraph-rsid="003493ae"/>
    </style:style>
    <style:style style:name="P36" style:family="paragraph" style:parent-style-name="Heading_20_2">
      <style:paragraph-properties fo:line-height="150%"/>
      <style:text-properties officeooo:rsid="0037db65" officeooo:paragraph-rsid="0037db65"/>
    </style:style>
    <style:style style:name="P37" style:family="paragraph" style:parent-style-name="Text_20_body">
      <style:paragraph-properties fo:line-height="150%"/>
      <style:text-properties officeooo:rsid="0037db65" officeooo:paragraph-rsid="0037db65"/>
    </style:style>
    <style:style style:name="P38" style:family="paragraph" style:parent-style-name="Heading_20_3">
      <style:text-properties style:font-name="Bitstream Vera Sans Mono" officeooo:rsid="0037db65" officeooo:paragraph-rsid="0037db65"/>
    </style:style>
    <style:style style:name="P39" style:family="paragraph" style:parent-style-name="Text_20_body">
      <style:text-properties style:font-name="Bitstream Vera Sans Mono" officeooo:rsid="0037db65" officeooo:paragraph-rsid="0037db65"/>
    </style:style>
    <style:style style:name="T1" style:family="text">
      <style:text-properties officeooo:rsid="00298b24"/>
    </style:style>
    <style:style style:name="T2" style:family="text">
      <style:text-properties officeooo:rsid="001eabe5"/>
    </style:style>
    <style:style style:name="T3" style:family="text">
      <style:text-properties officeooo:rsid="003493ae"/>
    </style:style>
    <style:style style:name="T4" style:family="text">
      <style:text-properties officeooo:rsid="00210775"/>
    </style:style>
    <style:style style:name="T5" style:family="text">
      <style:text-properties officeooo:rsid="0022fbb9"/>
    </style:style>
    <style:style style:name="T6" style:family="text">
      <style:text-properties officeooo:rsid="00243a19"/>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288f2d"/>
    </style:style>
    <style:style style:name="T10" style:family="text">
      <style:text-properties officeooo:rsid="00288f2d" fo:background-color="#00a933" loext:char-shading-value="0"/>
    </style:style>
    <style:style style:name="T11" style:family="text">
      <style:text-properties officeooo:rsid="0029eb6d"/>
    </style:style>
    <style:style style:name="T12" style:family="text">
      <style:text-properties officeooo:rsid="002af1a3"/>
    </style:style>
    <style:style style:name="T13" style:family="text">
      <style:text-properties officeooo:rsid="002d258c"/>
    </style:style>
    <style:style style:name="T14" style:family="text">
      <style:text-properties officeooo:rsid="0036637c"/>
    </style:style>
    <style:style style:name="T15" style:family="text">
      <style:text-properties officeooo:rsid="00335565"/>
    </style:style>
    <style:style style:name="T16" style:family="text">
      <style:text-properties officeooo:rsid="003949d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column-sep style:width="0.009cm" style:color="#000000" style:height="100%" style:style="dotted"/>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URE GATEWAY SETUP</text:p>
      <text:p text:style-name="P2">Write-Up</text:p>
      <text:p text:style-name="P3"><text:bookmark-start text:name="__RefHeading___Toc2_4060935862"/>by Raphael Beauregard<text:bookmark-end text:name="__RefHeading___Toc2_4060935862"/></text:p>
      <text:p text:style-name="P2"/>
      <text:p text:style-name="P2"/>
      <text:p text:style-name="P2"/>
      <text:p text:style-name="P2"/>
      <text:p text:style-name="P2"/>
      <text:p text:style-name="P2"/>
      <text:p text:style-name="P2"/>
      <text:p text:style-name="P2"/>
      <text:p text:style-name="P2"/>
      <text:p text:style-name="P4">[MAKING SURE THE LABS ENV. IS SECURE]</text:p>
      <text:p text:style-name="P5">by adding an I<text:span text:style-name="T1">D</text:span>S &amp; Firewall rules</text:p>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Heading_20_1" text:outline-level="1"><text:soft-page-break/>Table of Contents</text:h>
          </text:index-title>
          <text:p text:style-name="P6"><text:a xlink:type="simple" xlink:href="#__RefHeading___Toc85_4060935862" office:name="Goal" text:style-name="Index_20_Link" text:visited-style-name="Index_20_Link">Goal<text:tab/>3</text:a></text:p>
          <text:p text:style-name="P7"><text:a xlink:type="simple" xlink:href="#__RefHeading___Toc898_170000225" office:name="Objective" text:style-name="Index_20_Link" text:visited-style-name="Index_20_Link">Objective<text:tab/>3</text:a></text:p>
          <text:p text:style-name="P7"><text:a xlink:type="simple" xlink:href="#__RefHeading___Toc292_4060935862" office:name="Considerations" text:style-name="Index_20_Link" text:visited-style-name="Index_20_Link">Considerations<text:tab/>3</text:a></text:p>
          <text:p text:style-name="P7"><text:a xlink:type="simple" xlink:href="#__RefHeading___Toc292_4060935862%20Copy%201" office:name="Expectations" text:style-name="Index_20_Link" text:visited-style-name="Index_20_Link">Expectations<text:tab/>3</text:a></text:p>
          <text:p text:style-name="P6"><text:a xlink:type="simple" xlink:href="#__RefHeading___Toc85_4060935862%20Copy%201" office:name="Methodology" text:style-name="Index_20_Link" text:visited-style-name="Index_20_Link">Methodology<text:tab/>4</text:a></text:p>
          <text:p text:style-name="P7"><text:a xlink:type="simple" xlink:href="#__RefHeading___Toc898_170000225%20Copy%201" office:name="Tools" text:style-name="Index_20_Link" text:visited-style-name="Index_20_Link">Tools<text:tab/>4</text:a></text:p>
          <text:p text:style-name="P6"><text:a xlink:type="simple" xlink:href="#__RefHeading___Toc776_458644569" office:name="Execution" text:style-name="Index_20_Link" text:visited-style-name="Index_20_Link">Execution<text:tab/>5</text:a></text:p>
          <text:p text:style-name="P7"><text:a xlink:type="simple" xlink:href="#__RefHeading___Toc453_458644569" office:name="Creation of new LANs" text:style-name="Index_20_Link" text:visited-style-name="Index_20_Link">Creation of new LANs<text:tab/>5</text:a></text:p>
          <text:p text:style-name="P7"><text:a xlink:type="simple" xlink:href="#__RefHeading___Toc455_458644569" office:name="Setting up the routing" text:style-name="Index_20_Link" text:visited-style-name="Index_20_Link">Setting up the routing<text:tab/>7</text:a></text:p>
          <text:p text:style-name="P7"><text:a xlink:type="simple" xlink:href="#__RefHeading___Toc457_458644569" office:name="Snort Configuration" text:style-name="Index_20_Link" text:visited-style-name="Index_20_Link">Snort Configuration<text:tab/>10</text:a></text:p>
          <text:p text:style-name="P7"><text:a xlink:type="simple" xlink:href="#__RefHeading___Toc639_458644569" office:name="Configuring an extra Firewall" text:style-name="Index_20_Link" text:visited-style-name="Index_20_Link">Configuring an extra Firewall<text:tab/>13</text:a></text:p>
          <text:p text:style-name="P8"><text:a xlink:type="simple" xlink:href="#__RefHeading___Toc641_458644569" office:name="Picking a firewall" text:style-name="Index_20_Link" text:visited-style-name="Index_20_Link">Picking a firewall<text:tab/>13</text:a></text:p>
        </text:index-body>
      </text:table-of-content>
      <text:p text:style-name="P2"/>
      <text:p text:style-name="P2"/>
      <text:p text:style-name="P2"/>
      <text:p text:style-name="P2"/>
      <text:p text:style-name="P2"/>
      <text:p text:style-name="P2"/>
      <text:p text:style-name="P2"/>
      <text:h text:style-name="P9" text:outline-level="1"><text:bookmark-start text:name="__RefHeading___Toc85_4060935862"/>Goal<text:bookmark-end text:name="__RefHeading___Toc85_4060935862"/></text:h>
      <text:h text:style-name="P10" text:outline-level="2"><text:bookmark-start text:name="__RefHeading___Toc898_170000225"/>Objective<text:bookmark-end text:name="__RefHeading___Toc898_170000225"/></text:h>
      <text:p text:style-name="P11">The ob<text:span text:style-name="T2">jective of this venture is to route all traffic through one machine. This machine can inspect packets, block/allow them, and generate alerts based on a set of rules. Our security gateway will act as a </text:span><text:span text:style-name="T3">guard</text:span><text:span text:style-name="T2"> between not only the LAN and the internet, but also as a shield for each client against other clients.</text:span></text:p>
      <text:h text:style-name="P10" text:outline-level="2"><text:bookmark-start text:name="__RefHeading___Toc292_4060935862"/>Considerations<text:bookmark-end text:name="__RefHeading___Toc292_4060935862"/></text:h>
      <text:p text:style-name="P12"><text:span text:style-name="T2">Since I do not have infinite resources, I have to set up this on the same machine as the SIEM. This means one machine </text:span><text:span text:style-name="T4">I will call a security server</text:span><text:span text:style-name="T2"> will act as a log aggregator + Gateway + I</text:span><text:span text:style-name="T1">D</text:span><text:span text:style-name="T2">S. In a real scalable environment, I would do things differently for performance purposes, but since there will never be more than 5-10 clients on here, I can just adjust the CPU and RAM allocation of the VM to fit needs as we go.</text:span></text:p>
      <text:h text:style-name="P10" text:outline-level="2"><text:bookmark-start text:name="__RefHeading___Toc292_4060935862 Copy 1"/>Expectations<text:bookmark-end text:name="__RefHeading___Toc292_4060935862 Copy 1"/></text:h>
      <text:p text:style-name="P13">I expect things to be easy enough, as I have experience with routing in Linux. I have also set up a basic pfSense instance in the past, which is similar to this LAB, just without the SIEM and the IDS.</text:p>
      <text:h text:style-name="P14" text:outline-level="1"><text:bookmark-start text:name="__RefHeading___Toc85_4060935862 Copy 1"/>Methodology<text:bookmark-end text:name="__RefHeading___Toc85_4060935862 Copy 1"/></text:h>
      <text:h text:style-name="P10" text:outline-level="2"><text:bookmark-start text:name="__RefHeading___Toc898_170000225 Copy 1"/>Tools<draw:frame draw:style-name="fr1" draw:name="Image18" text:anchor-type="char" svg:width="17.59cm" svg:height="7.71cm" draw:z-index="19"><draw:image xlink:href="Pictures/10000001000003DE000001B24CFFF83E.png" xlink:type="simple" xlink:show="embed" xlink:actuate="onLoad" draw:mime-type="image/png"/></draw:frame><text:bookmark-end text:name="__RefHeading___Toc898_170000225 Copy 1"/></text:h>
      <text:list text:style-name="L1">
        <text:list-item>
          <text:p text:style-name="P15">Splunk</text:p>
        </text:list-item>
        <text:list-item>
          <text:p text:style-name="P15">Snort</text:p>
        </text:list-item>
        <text:list-item>
          <text:p text:style-name="P15">virsh</text:p>
        </text:list-item>
        <text:list-item>
          <text:p text:style-name="P15">QEMU/KVM</text:p>
        </text:list-item>
        <text:list-item>
          <text:p text:style-name="P16">nftables</text:p>
        </text:list-item>
      </text:list>
      <text:p text:style-name="P17">I am going to create a seperate internal LAN interface that has no bridge to the host server (the ones running the VMs). It will be fully isolated. The gateway will point to the security server. The security server will have two interfaces: the isolated LAN and another network that will be bridged for Internet access. Even if a <text:soft-page-break/>client changes their configuration, it will not be able to access the Internet unless it passes through the security server.</text:p>
      <text:p text:style-name="P17"/>
      <text:p text:style-name="P18">I will also have to add the logs of Snort and nftables (or global networking logs) as data sources in Splunk.</text:p>
      <text:h text:style-name="Heading_20_1" text:outline-level="1"><text:bookmark-start text:name="__RefHeading___Toc776_458644569"/>Execution<text:bookmark-end text:name="__RefHeading___Toc776_458644569"/></text:h>
      <text:h text:style-name="P19" text:outline-level="2"><text:bookmark-start text:name="__RefHeading___Toc453_458644569"/><text:span text:style-name="T5">Creation of </text:span><text:span text:style-name="T6">new</text:span><text:span text:style-name="T5"> LAN</text:span><text:span text:style-name="T6">s</text:span><text:bookmark-end text:name="__RefHeading___Toc453_458644569"/></text:h>
      <text:p text:style-name="P20"><draw:frame draw:style-name="fr2" draw:name="Frame1" text:anchor-type="char" svg:width="17.59cm" draw:z-index="0"><draw:text-box fo:min-height="4.411cm"><text:p text:style-name="Figure">Figure <text:sequence text:ref-name="refFigure0" text:name="Figure" text:formula="ooow:Figure+1" style:num-format="1">1</text:sequence>: Creation of XML to define the network<draw:frame draw:style-name="fr3" draw:name="Image1" text:anchor-type="char" svg:width="14.813cm" svg:height="5.105cm" draw:z-index="1"><draw:image xlink:href="Pictures/1000000100000230000000C168456456.png" xlink:type="simple" xlink:show="embed" xlink:actuate="onLoad" draw:mime-type="image/png"/></draw:frame></text:p></draw:text-box></draw:frame></text:p>
      <text:p text:style-name="P21">As I was setting this up, I’ve also <text:span text:style-name="T6">decided to delete the original splunk_lan I had to use a more distinct IP range.</text:span></text:p>
      <text:p text:style-name="P21"><draw:frame draw:style-name="fr3" draw:name="Image3" text:anchor-type="char" svg:width="17.59cm" svg:height="4.505cm" draw:z-index="3"><draw:image xlink:href="Pictures/100000010000037A000000E46041FAA9.png" xlink:type="simple" xlink:show="embed" xlink:actuate="onLoad" draw:mime-type="image/png"/></draw:frame></text:p>
      <text:p text:style-name="P22"><text:soft-page-break/>I also have to allow the bridge to be created by QEMU.</text:p>
      <text:p text:style-name="P21"><draw:frame draw:style-name="fr4" draw:name="Image2" text:anchor-type="char" svg:x="0cm" svg:y="0.187cm" svg:width="17.59cm" svg:height="2.545cm" draw:z-index="2"><draw:image xlink:href="Pictures/100000010000037B00000081996F7214.png" xlink:type="simple" xlink:show="embed" xlink:actuate="onLoad" draw:mime-type="image/png"/></draw:frame></text:p>
      <text:p text:style-name="P21"/>
      <text:p text:style-name="P23">Now, we have to create a new network card for the security server, and change the existing one.</text:p>
      <text:p text:style-name="P23"><draw:frame draw:style-name="fr4" draw:name="Image4" text:anchor-type="char" svg:x="0cm" svg:y="0.086cm" svg:width="17.59cm" svg:height="10.455cm" draw:z-index="4"><draw:image xlink:href="Pictures/100000010000053B0000031C472CBB6E.png" xlink:type="simple" xlink:show="embed" xlink:actuate="onLoad" draw:mime-type="image/png"/></draw:frame></text:p>
      <text:p text:style-name="P23">For every client, I assigned their only network interfaces to <text:span text:style-name="T7">virbr_ispl </text:span><text:span text:style-name="T8">which is the isolated LAN.</text:span></text:p>
      <text:h text:style-name="P24" text:outline-level="2"><text:bookmark-start text:name="__RefHeading___Toc455_458644569"/><text:soft-page-break/>Setting up the routing<text:bookmark-end text:name="__RefHeading___Toc455_458644569"/></text:h>
      <text:p text:style-name="P25">So now that we have both interfaces with ready, with eth0 having the static IP of the default gateway...</text:p>
      <text:p text:style-name="P25"><draw:frame draw:style-name="fr4" draw:name="Image5" text:anchor-type="char" svg:x="3.505cm" svg:y="-0.074cm" svg:width="10.121cm" svg:height="4.925cm" draw:z-index="5"><draw:image xlink:href="Pictures/10000001000003550000019F617741C5.png" xlink:type="simple" xlink:show="embed" xlink:actuate="onLoad" draw:mime-type="image/png"/></draw:frame></text:p>
      <text:p text:style-name="P25"/>
      <text:p text:style-name="P25"/>
      <text:p text:style-name="P25"/>
      <text:p text:style-name="P25"/>
      <text:p text:style-name="P25"/>
      <text:p text:style-name="P25">We can start routing and forward traffic.</text:p>
      <text:list text:style-name="L2">
        <text:list-item>
          <text:p text:style-name="P26"><draw:frame draw:style-name="fr4" draw:name="Image6" text:anchor-type="char" svg:x="0cm" svg:y="-0.231cm" svg:width="17.59cm" svg:height="1.713cm" draw:z-index="6"><draw:image xlink:href="Pictures/100000010000035E000000542CF9B66D.png" xlink:type="simple" xlink:show="embed" xlink:actuate="onLoad" draw:mime-type="image/png"/></draw:frame>We enable IP forwarding</text:p>
        </text:list-item>
        <text:list-item>
          <text:p text:style-name="P26">We hide the or<draw:frame draw:style-name="fr3" draw:name="Image19" text:anchor-type="char" svg:width="16.955cm" svg:height="7.431cm" draw:z-index="20"><draw:image xlink:href="Pictures/10000001000003DE000001B24CFFF83E.png" xlink:type="simple" xlink:show="embed" xlink:actuate="onLoad" draw:mime-type="image/png"/></draw:frame>iginal source IP with NAT</text:p>
        </text:list-item>
        <text:list-item>
          <text:p text:style-name="P26"><text:soft-page-break/>We allow forwards from eth0 to eth1</text:p>
        </text:list-item>
        <text:list-item>
          <text:p text:style-name="P26">We allow forwards from eth1 to eth0 only if there’s an existing relationship for the packet</text:p>
        </text:list-item>
      </text:list>
      <text:p text:style-name="P25">These rules are, by default, temporary. However, you can use the iptables-persistent package to save your configuration.</text:p>
      <text:p text:style-name="P27"/>
      <text:p text:style-name="P27"><draw:frame draw:style-name="fr4" draw:name="Image7" text:anchor-type="char" svg:x="0cm" svg:y="-0.31cm" svg:width="17.59cm" svg:height="1.713cm" draw:z-index="7"><draw:image xlink:href="Pictures/100000010000035E00000054B202023E.png" xlink:type="simple" xlink:show="embed" xlink:actuate="onLoad" draw:mime-type="image/png"/></draw:frame>Since I have not created a DHCP server, and I do not want to fight with XML Network creation stuff, I will set static I<text:span text:style-name="T1">P confgurations</text:span>, <text:span text:style-name="T9">DNS settings, etc...</text:span> for the clients. Once that’s done, <text:span text:style-name="T9">they can access the Internet. </text:span><text:span text:style-name="T10">Consider DNS and DHCP server future</text:span></text:p>
      <text:p text:style-name="P27"><draw:frame draw:style-name="fr2" draw:name="Frame2" text:anchor-type="char" svg:width="14.947cm" draw:z-index="8"><draw:text-box fo:min-height="4.895cm"><text:p text:style-name="Figure"><draw:frame draw:style-name="fr5" draw:name="Image8" text:anchor-type="paragraph" svg:width="14.947cm" style:rel-width="100%" svg:height="4.895cm" style:rel-height="scale" draw:z-index="9"><draw:image xlink:href="Pictures/1000000100000235000000B9FA7FB610.png" xlink:type="simple" xlink:show="embed" xlink:actuate="onLoad" draw:mime-type="image/png"/></draw:frame>Figure <text:sequence text:ref-name="refFigure1" text:name="Figure" text:formula="ooow:Figure+1" style:num-format="1">2</text:sequence>: Ubuntu Service Server with Internet access</text:p></draw:text-box></draw:frame></text:p>
      <text:p text:style-name="P28">I ran into some issues afterwards because the virtual network gateway also uses 192.168.15.1. Finding the source of some issues took me a while. I changed it to .2 to avoid conflicts.</text:p>
      <text:p text:style-name="P28"><text:soft-page-break/></text:p>
      <text:p text:style-name="P28">Net.ipv4.ip_forward also resets itself after a reboot, so I had to add it to /etc/systctl.conf. LAN devices also still have access to local services, of course.</text:p>
      <text:p text:style-name="P28"/>
      <text:p text:style-name="P28"><draw:frame draw:style-name="fr4" draw:name="Image9" text:anchor-type="char" svg:x="0cm" svg:y="-0.078cm" svg:width="17.59cm" svg:height="13.247cm" draw:z-index="10"><draw:image xlink:href="Pictures/10000001000004F4000003BB811AADB1.png" xlink:type="simple" xlink:show="embed" xlink:actuate="onLoad" draw:mime-type="image/png"/></draw:frame></text:p>
      <text:p text:style-name="P28"/>
      <text:h text:style-name="P29" text:outline-level="2"><text:bookmark-start text:name="__RefHeading___Toc457_458644569"/>Snort Configuration<text:bookmark-end text:name="__RefHeading___Toc457_458644569"/></text:h>
      <text:p text:style-name="P30"><text:a xlink:type="simple" xlink:href="https://github.com/snort3/snort3#build-snort" text:style-name="Internet_20_link" text:visited-style-name="Visited_20_Internet_20_Link">After <text:span text:style-name="T11">building</text:span> Snort 3 and <text:span text:style-name="T11">installing </text:span>its dependencies (libdaq and other libraries)</text:a>, it was time to configure it. <text:span text:style-name="T12">I first created the necessary directories.</text:span></text:p>
      <text:p text:style-name="P30"><draw:frame draw:style-name="fr4" draw:name="Image10" text:anchor-type="char" svg:x="1.573cm" svg:y="-0.046cm" svg:width="14.444cm" svg:height="3.784cm" draw:z-index="11"><draw:image xlink:href="Pictures/10000001000002220000008F2DCC9571.png" xlink:type="simple" xlink:show="embed" xlink:actuate="onLoad" draw:mime-type="image/png"/></draw:frame></text:p>
      <text:p text:style-name="P31">Then, I set up the lua configuration under /usr/local/snort/etc/snort/snort.lua</text:p>
      <text:p text:style-name="P31"><draw:frame draw:style-name="fr4" draw:name="Image11" text:anchor-type="char" svg:x="0.079cm" svg:y="0.252cm" svg:width="17.433cm" svg:height="7.089cm" draw:z-index="12"><draw:image xlink:href="Pictures/10000001000002930000010C3E7A2095.png" xlink:type="simple" xlink:show="embed" xlink:actuate="onLoad" draw:mime-type="image/png"/></draw:frame></text:p>
      <text:p text:style-name="P32"><text:soft-page-break/>I will only run Snort in IDS mode, because I want to use this environment to learn attack patterns later on (blocking the attack altogether would not allow me to study them).</text:p>
      <text:p text:style-name="P32"/>
      <text:p text:style-name="P32"/>
      <text:p text:style-name="P32"><draw:frame draw:style-name="fr6" draw:name="Image12" text:anchor-type="char" svg:width="8.01cm" svg:height="7.657cm" draw:z-index="13"><draw:image xlink:href="Pictures/1000000100000198000001866DF81529.png" xlink:type="simple" xlink:show="embed" xlink:actuate="onLoad" draw:mime-type="image/png"/></draw:frame><draw:frame draw:style-name="fr1" draw:name="Image20" text:anchor-type="char" svg:width="17.59cm" svg:height="7.71cm" draw:z-index="21"><draw:image xlink:href="Pictures/10000001000003DE000001B24CFFF83E.png" xlink:type="simple" xlink:show="embed" xlink:actuate="onLoad" draw:mime-type="image/png"/></draw:frame>Next up, we have to ensure Snort outputs in JSON so that Splunk can easily parse the data <text:span text:style-name="T13">and also make Snort act as an IDS, not an IPS </text:span><text:span text:style-name="T14">in the configuration file</text:span><text:span text:style-name="T13">.</text:span></text:p>
      <text:p text:style-name="P33"/>
      <text:p text:style-name="P34">After this, all that’s left for the initial configuration is to make Snort run on boot with a systemd service. <text:span text:style-name="T15">I added some arguments to Snort because I had issues with the config file.</text:span></text:p>
      <text:p text:style-name="P33"><draw:frame draw:style-name="fr4" draw:name="Image15" text:anchor-type="char" svg:x="-0.099cm" svg:y="0.185cm" svg:width="17.59cm" svg:height="4.909cm" draw:z-index="14"><draw:image xlink:href="Pictures/1000000100000441000001307CE71D86.png" xlink:type="simple" xlink:show="embed" xlink:actuate="onLoad" draw:mime-type="image/png"/></draw:frame><text:soft-page-break/></text:p>
      <text:p text:style-name="P33"/>
      <text:p text:style-name="P33">...<text:span text:style-name="T3">and here, we now have logs for unusual activity.</text:span></text:p>
      <text:p text:style-name="P33"/>
      <text:p text:style-name="P33"/>
      <text:p text:style-name="P33"><draw:frame draw:style-name="fr1" draw:name="Image13" text:anchor-type="char" svg:width="17.59cm" svg:height="2.953cm" draw:z-index="15"><draw:image xlink:href="Pictures/100000010000042A000000B39E3E8F81.png" xlink:type="simple" xlink:show="embed" xlink:actuate="onLoad" draw:mime-type="image/png"/></draw:frame></text:p>
      <text:p text:style-name="P35">I’ve added a custom test rule as well:</text:p>
      <text:p text:style-name="P35"/>
      <text:p text:style-name="P35"><draw:frame draw:style-name="fr3" draw:name="Image14" text:anchor-type="char" svg:width="17.59cm" svg:height="2.083cm" draw:z-index="17"><draw:image xlink:href="Pictures/100000010000037F0000006ACA5D5068.png" xlink:type="simple" xlink:show="embed" xlink:actuate="onLoad" draw:mime-type="image/png"/></draw:frame></text:p>
      <text:p text:style-name="P35"><draw:frame draw:style-name="fr1" draw:name="Image16" text:anchor-type="char" svg:width="17.59cm" svg:height="2.9cm" draw:z-index="16"><draw:image xlink:href="Pictures/1000000100000443000000B46D709654.png" xlink:type="simple" xlink:show="embed" xlink:actuate="onLoad" draw:mime-type="image/png"/></draw:frame><text:soft-page-break/></text:p>
      <text:p text:style-name="P35">We can now add the JSON version as a data source in Splunk.</text:p>
      <text:h text:style-name="P36" text:outline-level="2" text:is-list-header="true"><text:bookmark-start text:name="__RefHeading___Toc639_458644569"/><draw:frame draw:style-name="fr7" draw:name="Image17" text:anchor-type="char" svg:x="1.741cm" svg:y="0.161cm" svg:width="14.45cm" svg:height="6.334cm" draw:z-index="18"><draw:image xlink:href="Pictures/10000001000003DE000001B24CFFF83E.png" xlink:type="simple" xlink:show="embed" xlink:actuate="onLoad" draw:mime-type="image/png"/></draw:frame>Configuring an extra Firewall<text:bookmark-end text:name="__RefHeading___Toc639_458644569"/></text:h>
      <text:p text:style-name="P37">I could use Snort to black some traffic, but that would be too easy. Using another application will also allow me to just turn that firewall off to try pen-testing things, but still get my Splunk logs due to Snort still being active. <text:s/>I want to familiarize myself with another tool too.</text:p>
      <text:h text:style-name="P38" text:outline-level="3"><text:bookmark-start text:name="__RefHeading___Toc641_458644569"/><text:span text:style-name="T16">Choosing</text:span> <text:span text:style-name="T16">the</text:span> firewall<text:bookmark-end text:name="__RefHeading___Toc641_458644569"/></text:h>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Mono" svg:font-family="'Bitstream Vera Sans Mono'" style:font-family-generic="modern" style:font-pitch="fixed"/>
    <style:font-face style:name="Bitstream Vera Sans Mono1" svg:font-family="'Bitstream Vera Sans Mono'" style:font-adornments="Bold" style:font-family-generic="modern" style:font-pitch="fixed"/>
    <style:font-face style:name="Bitstream Vera Sans Mono2" svg:font-family="'Bitstream Vera Sans Mono'" style:font-adornments="Roman"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Bitstream Vera Sans Mono" fo:font-family="'Bitstream Vera Sans Mono'" style:font-family-generic="modern" style:font-pitch="fixed"/>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line-height="100%" fo:text-indent="0cm" style:auto-text-indent="false" text:number-lines="false" text:line-number="0"/>
      <style:text-properties style:font-name="Bitstream Vera Sans Mono1" fo:font-family="'Bitstream Vera Sans Mono'" style:font-style-name="Bold" style:font-family-generic="modern" style:font-pitch="fixed"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Bitstream Vera Sans Mono" fo:font-family="'Bitstream Vera Sans Mono'" style:font-family-generic="modern" style:font-pitch="fixed" fo:font-size="22pt" fo:font-weight="bold" officeooo:rsid="001a7a8b" style:font-size-asian="22pt" style:font-weight-asian="bold" style:font-size-complex="22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text-properties style:font-name="Bitstream Vera Sans Mono2" fo:font-family="'Bitstream Vera Sans Mono'" style:font-style-name="Roman" style:font-family-generic="modern" style:font-pitch="fixe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Bitstream Vera Sans Mono" fo:font-family="'Bitstream Vera Sans Mono'" style:font-family-generic="modern" style:font-pitch="fixed" fo:font-size="16pt" fo:font-weight="bold" officeooo:rsid="001a7a8b"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Bitstream Vera Sans Mono" officeooo:paragraph-rsid="0016a50f"/>
    </style:style>
    <style:style style:name="MP2" style:family="paragraph" style:parent-style-name="Text_20_body">
      <style:paragraph-properties fo:text-align="center" style:justify-single-word="false"/>
      <style:text-properties style:font-name="Bitstream Vera Sans Mono" officeooo:rsid="0016a50f" officeooo:paragraph-rsid="0016a50f"/>
    </style:style>
    <style:style style:name="MP3" style:family="paragraph" style:parent-style-name="Text_20_body">
      <style:paragraph-properties fo:text-align="center" style:justify-single-word="false"/>
      <style:text-properties style:font-name="Bitstream Vera Sans Mono" officeooo:rsid="00185b33" officeooo:paragraph-rsid="00185b33"/>
    </style:style>
    <style:style style:name="MT1" style:family="text">
      <style:text-properties officeooo:rsid="00298278"/>
    </style:style>
    <style:style style:name="MT2" style:family="text">
      <style:text-properties officeooo:rsid="0016a50f"/>
    </style:style>
    <style:style style:name="MT3" style:family="text">
      <style:text-properties officeooo:rsid="001eabe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ECURE GATEWAY</text:span><text:span text:style-name="MT2"> W-U</text:span><text:tab/><text:tab/><text:page-number style:num-format="1" text:select-page="current">12</text:page-number></text:p>
      </style:header>
      <style:header-first>
        <text:p text:style-name="Header_20_left"/>
      </style:header-first>
      <style:footer>
        <text:p text:style-name="MP2">aeroraph.dev // raphael@aeroraph.dev</text:p>
        <text:p text:style-name="MP2"/>
      </style:footer>
      <style:footer-first>
        <text:p text:style-name="MP3"><text:span text:style-name="MT3">23</text:span> <text:span text:style-name="MT3">APRIL</text:span> 20<text:span text:style-name="MT3">26</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2T22:34:34.082519761</meta:creation-date>
    <meta:editing-duration>PT2H16M13S</meta:editing-duration>
    <meta:editing-cycles>12</meta:editing-cycles>
    <meta:generator>LibreOffice/26.2.2.2$Linux_X86_64 LibreOffice_project/1f77d10d6938fd34972958f64b2bcfa54f8b1ba5</meta:generator>
    <dc:date>2026-04-23T20:56:57.483309694</dc:date>
    <meta:document-statistic meta:table-count="0" meta:image-count="20" meta:object-count="0" meta:page-count="13" meta:paragraph-count="68" meta:word-count="869" meta:character-count="4826" meta:non-whitespace-character-count="4032"/>
  </office:meta>
</office:document-meta>
</file>