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E000002FC4D9BB4D1.png" manifest:media-type="image/png"/>
  <manifest:file-entry manifest:full-path="Pictures/10000001000003DE000002FC230C1469.png" manifest:media-type="image/png"/>
  <manifest:file-entry manifest:full-path="Pictures/10000001000004EE000003B439EB74EC.png" manifest:media-type="image/png"/>
  <manifest:file-entry manifest:full-path="Pictures/10000001000004EE000003B4D13F74D1.png" manifest:media-type="image/png"/>
  <manifest:file-entry manifest:full-path="Pictures/10000001000001A20000013ACF1A741F.png" manifest:media-type="image/png"/>
  <manifest:file-entry manifest:full-path="Pictures/100000010000022C00000062ADF6FCB1.png" manifest:media-type="image/png"/>
  <manifest:file-entry manifest:full-path="Pictures/10000001000002230000009C4CEF0992.png" manifest:media-type="image/png"/>
  <manifest:file-entry manifest:full-path="Pictures/1000000100000266000001198A605134.png" manifest:media-type="image/png"/>
  <manifest:file-entry manifest:full-path="Pictures/10000001000004E9000003B098CE7D4F.png" manifest:media-type="image/png"/>
  <manifest:file-entry manifest:full-path="Pictures/1000000100000615000002CB02C0A039.png" manifest:media-type="image/png"/>
  <manifest:file-entry manifest:full-path="Pictures/10000001000003720000010B1EACE50F.png" manifest:media-type="image/png"/>
  <manifest:file-entry manifest:full-path="Pictures/10000001000001D30000004403DC35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Mono" svg:font-family="'Bitstream Vera Sans Mono'" style:font-family-generic="modern" style:font-pitch="fixed"/>
    <style:font-face style:name="Bitstream Vera Sans Mono1" svg:font-family="'Bitstream Vera Sans Mono'" style:font-adornments="Bold" style:font-family-generic="modern" style:font-pitch="fixed"/>
    <style:font-face style:name="Bitstream Vera Sans Mono2" svg:font-family="'Bitstream Vera Sans Mono'" style:font-adornments="Roman"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1" style:family="table-row">
      <style:table-row-properties style:min-row-height="0.794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Title">
      <style:text-properties style:font-name="Bitstream Vera Sans Mono" officeooo:rsid="001d2193" officeooo:paragraph-rsid="001d2193"/>
    </style:style>
    <style:style style:name="P2" style:family="paragraph" style:parent-style-name="Text_20_body">
      <style:paragraph-properties fo:text-align="center" style:justify-single-word="false"/>
      <style:text-properties style:font-name="Bitstream Vera Sans Mono" officeooo:rsid="0016a50f" officeooo:paragraph-rsid="0016a50f"/>
    </style:style>
    <style:style style:name="P3" style:family="paragraph" style:parent-style-name="Text_20_body">
      <style:paragraph-properties fo:text-align="center" style:justify-single-word="false"/>
      <style:text-properties fo:font-size="13pt" style:font-size-asian="13pt" style:font-size-complex="13pt"/>
    </style:style>
    <style:style style:name="P4" style:family="paragraph" style:parent-style-name="Text_20_body">
      <style:paragraph-properties fo:text-align="center" style:justify-single-word="false"/>
      <style:text-properties style:font-name="Bitstream Vera Sans Mono" fo:font-style="italic" officeooo:rsid="001d2193" officeooo:paragraph-rsid="001d2193" style:font-style-asian="italic" style:font-style-complex="italic"/>
    </style:style>
    <style:style style:name="P5" style:family="paragraph" style:parent-style-name="Contents_20_Heading">
      <style:paragraph-properties>
        <style:tab-stops>
          <style:tab-stop style:position="17.588cm" style:type="right" style:leader-style="dotted" style:leader-text="."/>
        </style:tab-stops>
      </style:paragraph-properties>
    </style:style>
    <style:style style:name="P6" style:family="paragraph" style:parent-style-name="Contents_20_2">
      <style:paragraph-properties>
        <style:tab-stops>
          <style:tab-stop style:position="17.089cm" style:type="right" style:leader-style="dotted" style:leader-text="."/>
        </style:tab-stops>
      </style:paragraph-properties>
    </style:style>
    <style:style style:name="P7" style:family="paragraph" style:parent-style-name="Heading_20_1">
      <style:paragraph-properties fo:line-height="150%" fo:break-before="page"/>
    </style:style>
    <style:style style:name="P8" style:family="paragraph" style:parent-style-name="Heading_20_2">
      <style:paragraph-properties fo:line-height="150%"/>
      <style:text-properties officeooo:rsid="001a7a8b" officeooo:paragraph-rsid="001a7a8b"/>
    </style:style>
    <style:style style:name="P9" style:family="paragraph" style:parent-style-name="Text_20_body">
      <style:paragraph-properties fo:line-height="150%"/>
    </style:style>
    <style:style style:name="P10" style:family="paragraph" style:parent-style-name="Text_20_body" style:list-style-name="List_20_1">
      <style:paragraph-properties fo:line-height="150%"/>
      <style:text-properties officeooo:rsid="001ea838" officeooo:paragraph-rsid="001ea838"/>
    </style:style>
    <style:style style:name="P11" style:family="paragraph" style:parent-style-name="Text_20_body">
      <style:paragraph-properties fo:line-height="150%"/>
      <style:text-properties officeooo:rsid="001ea838" officeooo:paragraph-rsid="001ea838"/>
    </style:style>
    <style:style style:name="P12" style:family="paragraph" style:parent-style-name="Text_20_body">
      <style:paragraph-properties fo:line-height="150%"/>
      <style:text-properties officeooo:paragraph-rsid="001ea838"/>
    </style:style>
    <style:style style:name="P13" style:family="paragraph" style:parent-style-name="Text_20_body">
      <style:paragraph-properties fo:line-height="150%"/>
      <style:text-properties officeooo:rsid="00205b30" officeooo:paragraph-rsid="00205b30"/>
    </style:style>
    <style:style style:name="P14" style:family="paragraph" style:parent-style-name="Heading_20_1">
      <style:paragraph-properties fo:line-height="150%" fo:break-before="page"/>
      <style:text-properties officeooo:paragraph-rsid="001a7a8b"/>
    </style:style>
    <style:style style:name="P15" style:family="paragraph" style:parent-style-name="Text_20_body">
      <style:paragraph-properties fo:line-height="150%"/>
      <style:text-properties officeooo:rsid="00209250" officeooo:paragraph-rsid="00209250"/>
    </style:style>
    <style:style style:name="P16" style:family="paragraph" style:parent-style-name="Heading_20_2">
      <style:paragraph-properties fo:line-height="150%"/>
      <style:text-properties officeooo:paragraph-rsid="001a7a8b"/>
    </style:style>
    <style:style style:name="P17" style:family="paragraph" style:parent-style-name="Text_20_body" style:list-style-name="L1">
      <style:paragraph-properties fo:line-height="150%"/>
      <style:text-properties officeooo:rsid="00209250" officeooo:paragraph-rsid="00209250"/>
    </style:style>
    <style:style style:name="P18" style:family="paragraph" style:parent-style-name="Heading_20_2">
      <style:text-properties officeooo:rsid="00209250" officeooo:paragraph-rsid="00209250"/>
    </style:style>
    <style:style style:name="P19" style:family="paragraph" style:parent-style-name="Table_20_Contents">
      <style:paragraph-properties fo:text-align="center" style:justify-single-word="false"/>
      <style:text-properties style:font-name="Bitstream Vera Sans Mono" officeooo:rsid="00209250" officeooo:paragraph-rsid="00209250"/>
    </style:style>
    <style:style style:name="P20" style:family="paragraph" style:parent-style-name="Table_20_Contents">
      <style:paragraph-properties fo:text-align="center" style:justify-single-word="false"/>
      <style:text-properties style:font-name="Bitstream Vera Sans Mono" officeooo:rsid="00210135" officeooo:paragraph-rsid="00210135"/>
    </style:style>
    <style:style style:name="P21" style:family="paragraph" style:parent-style-name="Text_20_body">
      <style:text-properties officeooo:paragraph-rsid="00209250"/>
    </style:style>
    <style:style style:name="P22" style:family="paragraph" style:parent-style-name="Heading_20_1">
      <style:paragraph-properties fo:line-height="150%" fo:break-before="page"/>
      <style:text-properties officeooo:rsid="001a7a8b" officeooo:paragraph-rsid="001a7a8b"/>
    </style:style>
    <style:style style:name="P23" style:family="paragraph" style:parent-style-name="Heading_20_2">
      <style:text-properties officeooo:rsid="00210135" officeooo:paragraph-rsid="00210135"/>
    </style:style>
    <style:style style:name="P24" style:family="paragraph" style:parent-style-name="Text_20_body">
      <style:paragraph-properties fo:line-height="150%"/>
      <style:text-properties officeooo:paragraph-rsid="001a7a8b"/>
    </style:style>
    <style:style style:name="P25" style:family="paragraph" style:parent-style-name="Text_20_body">
      <style:paragraph-properties fo:line-height="150%"/>
      <style:text-properties officeooo:paragraph-rsid="00210135"/>
    </style:style>
    <style:style style:name="P26" style:family="paragraph" style:parent-style-name="Text_20_body">
      <style:paragraph-properties fo:line-height="150%"/>
      <style:text-properties officeooo:rsid="00210135" officeooo:paragraph-rsid="00210135"/>
    </style:style>
    <style:style style:name="P27" style:family="paragraph" style:parent-style-name="Text_20_body">
      <style:paragraph-properties fo:line-height="150%"/>
      <style:text-properties officeooo:rsid="00212d7f" officeooo:paragraph-rsid="00212d7f"/>
    </style:style>
    <style:style style:name="P28" style:family="paragraph" style:parent-style-name="Text_20_body">
      <style:paragraph-properties fo:line-height="150%" fo:text-align="center" style:justify-single-word="false"/>
      <style:text-properties officeooo:rsid="00212d7f" officeooo:paragraph-rsid="00212d7f"/>
    </style:style>
    <style:style style:name="P29" style:family="paragraph" style:parent-style-name="Heading_20_2">
      <style:text-properties officeooo:rsid="00212d7f" officeooo:paragraph-rsid="00212d7f"/>
    </style:style>
    <style:style style:name="P30" style:family="paragraph" style:parent-style-name="Text_20_body">
      <style:text-properties officeooo:rsid="00212d7f" officeooo:paragraph-rsid="00212d7f"/>
    </style:style>
    <style:style style:name="P31" style:family="paragraph" style:parent-style-name="Text_20_body">
      <style:text-properties fo:font-size="10.5pt" fo:font-weight="bold" officeooo:rsid="00212d7f" officeooo:paragraph-rsid="00212d7f" style:font-size-asian="10.5pt" style:font-weight-asian="bold" style:font-size-complex="10.5pt" style:font-weight-complex="bold"/>
    </style:style>
    <style:style style:name="P32" style:family="paragraph" style:parent-style-name="Text_20_body">
      <style:text-properties officeooo:rsid="00219dab" officeooo:paragraph-rsid="00219dab"/>
    </style:style>
    <style:style style:name="P33" style:family="paragraph" style:parent-style-name="Text_20_body">
      <style:text-properties officeooo:rsid="0022b09a" officeooo:paragraph-rsid="0022b09a"/>
    </style:style>
    <style:style style:name="P34" style:family="paragraph" style:parent-style-name="Heading_20_2">
      <style:text-properties officeooo:rsid="0022b09a" officeooo:paragraph-rsid="0022b09a"/>
    </style:style>
    <style:style style:name="P35" style:family="paragraph" style:parent-style-name="Text_20_body">
      <style:text-properties officeooo:rsid="002456cd" officeooo:paragraph-rsid="002456cd"/>
    </style:style>
    <style:style style:name="P36" style:family="paragraph" style:parent-style-name="Text_20_body">
      <style:text-properties officeooo:rsid="0025892f" officeooo:paragraph-rsid="0025892f"/>
    </style:style>
    <style:style style:name="P37" style:family="paragraph" style:parent-style-name="Heading_20_2">
      <style:text-properties officeooo:rsid="002456cd" officeooo:paragraph-rsid="002456cd"/>
    </style:style>
    <style:style style:name="P38" style:family="paragraph" style:parent-style-name="Text_20_body">
      <style:text-properties officeooo:rsid="00276a61" officeooo:paragraph-rsid="00276a61"/>
    </style:style>
    <style:style style:name="P39" style:family="paragraph" style:parent-style-name="Heading_20_2">
      <style:text-properties officeooo:rsid="002913d3" officeooo:paragraph-rsid="002913d3"/>
    </style:style>
    <style:style style:name="P40" style:family="paragraph" style:parent-style-name="Text_20_body">
      <style:text-properties officeooo:rsid="002913d3" officeooo:paragraph-rsid="002913d3"/>
    </style:style>
    <style:style style:name="P41" style:family="paragraph" style:parent-style-name="Text_20_body">
      <style:text-properties officeooo:rsid="00298b39" officeooo:paragraph-rsid="002913d3"/>
    </style:style>
    <style:style style:name="P42" style:family="paragraph" style:parent-style-name="Text_20_body">
      <style:text-properties officeooo:rsid="002ae3ae" officeooo:paragraph-rsid="002ae3ae"/>
    </style:style>
    <style:style style:name="P43" style:family="paragraph" style:parent-style-name="Heading_20_1">
      <style:text-properties officeooo:rsid="002ae3ae" officeooo:paragraph-rsid="002ae3ae"/>
    </style:style>
    <style:style style:name="P44" style:family="paragraph" style:parent-style-name="Text_20_body">
      <style:text-properties officeooo:rsid="002b0fda" officeooo:paragraph-rsid="002b0fda"/>
    </style:style>
    <style:style style:name="T1" style:family="text">
      <style:text-properties officeooo:rsid="001d2193"/>
    </style:style>
    <style:style style:name="T2" style:family="text">
      <style:text-properties officeooo:rsid="001ea838"/>
    </style:style>
    <style:style style:name="T3" style:family="text">
      <style:text-properties officeooo:rsid="001a7a8b"/>
    </style:style>
    <style:style style:name="T4" style:family="text">
      <style:text-properties officeooo:rsid="00212d7f"/>
    </style:style>
    <style:style style:name="T5" style:family="text">
      <style:text-properties officeooo:rsid="00210135"/>
    </style:style>
    <style:style style:name="T6" style:family="text">
      <style:text-properties officeooo:rsid="00219dab"/>
    </style:style>
    <style:style style:name="T7" style:family="text">
      <style:text-properties officeooo:rsid="0022b09a"/>
    </style:style>
    <style:style style:name="T8" style:family="text">
      <style:text-properties officeooo:rsid="002456cd"/>
    </style:style>
    <style:style style:name="T9" style:family="text">
      <style:text-properties officeooo:rsid="0025892f"/>
    </style:style>
    <style:style style:name="T10" style:family="text">
      <style:text-properties officeooo:rsid="00276a61"/>
    </style:style>
    <style:style style:name="T11" style:family="text">
      <style:text-properties officeooo:rsid="00298b39"/>
    </style:style>
    <style:style style:name="fr1"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09cm" style:color="#000000" style:height="100%" style:style="dotted"/>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LUNK LABS ENVIRONNEMENT</text:p>
      <text:p text:style-name="P2">Write-Up</text:p>
      <text:p text:style-name="P3"><text:bookmark-start text:name="__RefHeading___Toc2_4060935862"/>by Raphael Beauregard<text:bookmark-end text:name="__RefHeading___Toc2_4060935862"/></text:p>
      <text:p text:style-name="P2"/>
      <text:p text:style-name="P2"/>
      <text:p text:style-name="P2"/>
      <text:p text:style-name="P2"/>
      <text:p text:style-name="P2"/>
      <text:p text:style-name="P2"/>
      <text:p text:style-name="P2"/>
      <text:p text:style-name="P2"/>
      <text:p text:style-name="P2"/>
      <text:p text:style-name="P2">[<text:span text:style-name="T1">FIRST-TIME LAB SETUP]</text:span></text:p>
      <text:p text:style-name="P4">Setting up a lab environment for future labs</text:p>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Heading_20_1" text:outline-level="1"><text:soft-page-break/>Table of Contents</text:h>
          </text:index-title>
          <text:p text:style-name="P5"><text:a xlink:type="simple" xlink:href="#__RefHeading___Toc85_4060935862" office:name="Goal" text:style-name="Index_20_Link" text:visited-style-name="Index_20_Link">Goal<text:tab/>3</text:a></text:p>
          <text:p text:style-name="P6"><text:a xlink:type="simple" xlink:href="#__RefHeading___Toc898_170000225" office:name="Objective" text:style-name="Index_20_Link" text:visited-style-name="Index_20_Link">Objective<text:tab/>3</text:a></text:p>
          <text:p text:style-name="P6"><text:a xlink:type="simple" xlink:href="#__RefHeading___Toc292_4060935862" office:name="Considerations" text:style-name="Index_20_Link" text:visited-style-name="Index_20_Link">Considerations<text:tab/>3</text:a></text:p>
          <text:p text:style-name="P6"><text:a xlink:type="simple" xlink:href="#__RefHeading___Toc292_4060935862%20Copy%201" office:name="Expectations" text:style-name="Index_20_Link" text:visited-style-name="Index_20_Link">Expectations<text:tab/>3</text:a></text:p>
          <text:p text:style-name="P5"><text:a xlink:type="simple" xlink:href="#__RefHeading___Toc85_4060935862%20Copy%201" office:name="Methodology" text:style-name="Index_20_Link" text:visited-style-name="Index_20_Link">Methodology<text:tab/>4</text:a></text:p>
          <text:p text:style-name="P6"><text:a xlink:type="simple" xlink:href="#__RefHeading___Toc898_170000225%20Copy%201" office:name="Tools" text:style-name="Index_20_Link" text:visited-style-name="Index_20_Link">Tools<text:tab/>4</text:a></text:p>
          <text:p text:style-name="P6"><text:a xlink:type="simple" xlink:href="#__RefHeading___Toc1467_170000225" office:name="Operating Systems" text:style-name="Index_20_Link" text:visited-style-name="Index_20_Link">Operating Systems<text:tab/>4</text:a></text:p>
          <text:p text:style-name="P5"><text:a xlink:type="simple" xlink:href="#__RefHeading___Toc85_4060935862%20Copy%201%20Copy%201" office:name="Execution" text:style-name="Index_20_Link" text:visited-style-name="Index_20_Link">Execution<text:tab/>5</text:a></text:p>
          <text:p text:style-name="P6"><text:a xlink:type="simple" xlink:href="#__RefHeading___Toc1520_170000225" office:name="Getting the VMs to post" text:style-name="Index_20_Link" text:visited-style-name="Index_20_Link">Getting the VMs to post<text:tab/>5</text:a></text:p>
          <text:p text:style-name="P6"><text:a xlink:type="simple" xlink:href="#__RefHeading___Toc1600_170000225" office:name="Networking" text:style-name="Index_20_Link" text:visited-style-name="Index_20_Link">Networking<text:tab/>6</text:a></text:p>
          <text:p text:style-name="P6"><text:a xlink:type="simple" xlink:href="#__RefHeading___Toc1602_170000225" office:name="Web Server Dummy Setup" text:style-name="Index_20_Link" text:visited-style-name="Index_20_Link">Web Server Dummy Setup<text:tab/>8</text:a></text:p>
          <text:p text:style-name="P6"><text:a xlink:type="simple" xlink:href="#__RefHeading___Toc1604_170000225" office:name="SIEM Server Splunk Initial Setup" text:style-name="Index_20_Link" text:visited-style-name="Index_20_Link">SIEM Server Splunk Initial Setup<text:tab/>8</text:a></text:p>
        </text:index-body>
      </text:table-of-content>
      <text:p text:style-name="P2"/>
      <text:p text:style-name="P2"/>
      <text:p text:style-name="P2"/>
      <text:p text:style-name="P2"/>
      <text:p text:style-name="P2"/>
      <text:p text:style-name="P2"/>
      <text:p text:style-name="P2"/>
      <text:h text:style-name="P7" text:outline-level="1"><text:bookmark-start text:name="__RefHeading___Toc85_4060935862"/>Goal<text:bookmark-end text:name="__RefHeading___Toc85_4060935862"/></text:h>
      <text:h text:style-name="P8" text:outline-level="2" text:is-list-header="true"><text:bookmark-start text:name="__RefHeading___Toc898_170000225"/>Objective<text:bookmark-end text:name="__RefHeading___Toc898_170000225"/></text:h>
      <text:p text:style-name="P9">The main <text:span text:style-name="T2">objective of this venture is to have four machines within the same network:</text:span></text:p>
      <text:list text:style-name="List_20_1">
        <text:list-item>
          <text:list>
            <text:list-item>
              <text:p text:style-name="P10">A service server</text:p>
            </text:list-item>
            <text:list-item>
              <text:p text:style-name="P10">A SIEM Server/Log aggregation server</text:p>
            </text:list-item>
            <text:list-item>
              <text:p text:style-name="P10">A client</text:p>
            </text:list-item>
            <text:list-item>
              <text:p text:style-name="P10">An attacker</text:p>
            </text:list-item>
          </text:list>
        </text:list-item>
      </text:list>
      <text:p text:style-name="P11">The virtual machines must be able to connect to each other and the internet.</text:p>
      <text:h text:style-name="P8" text:outline-level="2"><text:bookmark-start text:name="__RefHeading___Toc292_4060935862"/>Considerations<text:bookmark-end text:name="__RefHeading___Toc292_4060935862"/></text:h>
      <text:p text:style-name="P12"><text:span text:style-name="T2">Four virtual machines might be a bit much for the average computer. That is why I have a server set up, mainly for this purpose. I must also ensure that the service ports I open do not get forwarded outside of the virtual LAN to avoid complications with outside attackers. I am stating this because there is a high chance future I will purposefully make some services vulnerable for pen-testing and research purposes.</text:span></text:p>
      <text:h text:style-name="P8" text:outline-level="2"><text:bookmark-start text:name="__RefHeading___Toc292_4060935862 Copy 1"/>Expectations<text:bookmark-end text:name="__RefHeading___Toc292_4060935862 Copy 1"/></text:h>
      <text:p text:style-name="P13">I expect things to go smoothly. I have significant experience with virtualisation and networking. The setup should be operational rather quickly. </text:p>
      <text:h text:style-name="P14" text:outline-level="1"><text:bookmark-start text:name="__RefHeading___Toc85_4060935862 Copy 1"/><text:span text:style-name="T3">Methodology</text:span><text:bookmark-end text:name="__RefHeading___Toc85_4060935862 Copy 1"/></text:h>
      <text:p text:style-name="P15">Instead of using CLI to setup virtual machines and install OSes from scratch with ISO images, I will be using tools to make the process quicker.</text:p>
      <text:h text:style-name="P16" text:outline-level="2"><text:bookmark-start text:name="__RefHeading___Toc898_170000225 Copy 1"/><text:span text:style-name="T3">Tools</text:span><text:bookmark-end text:name="__RefHeading___Toc898_170000225 Copy 1"/></text:h>
      <text:list text:style-name="L1">
        <text:list-item>
          <text:p text:style-name="P17">Vagrant</text:p>
        </text:list-item>
        <text:list-item>
          <text:p text:style-name="P17">libvirtd &amp; virsh</text:p>
        </text:list-item>
        <text:list-item>
          <text:p text:style-name="P17">Virtual Machine Manager (Client APP)</text:p>
        </text:list-item>
      </text:list>
      <text:p text:style-name="P15">Using the QEMU/KVM protocol, I will be able to manage and access virtual machines Vagrant will have created for <text:span text:style-name="T4">me (as user session VMs)</text:span>. The management of a virtual network will be easy and convenient from there thanks to the GUI. For the creation of the network itself, however, I will use the CLI.</text:p>
      <text:p text:style-name="P15">Once the network connections are established. It’s only a matter of installing Splunk of the SIEM Server, and forwarders on both the service server and client.</text:p>
      <text:h text:style-name="P18" text:outline-level="2"><text:bookmark-start text:name="__RefHeading___Toc1467_170000225"/>Operating Systems<text:bookmark-end text:name="__RefHeading___Toc1467_170000225"/></text:h>
      <table:table table:name="Table1" table:style-name="Table1">
        <table:table-column table:style-name="Table1.A" table:number-columns-repeated="3"/>
        <table:table-row table:style-name="Table1.1">
          <table:table-cell table:style-name="Table1.A1" office:value-type="string">
            <text:p text:style-name="P19">Machine</text:p>
          </table:table-cell>
          <table:table-cell table:style-name="Table1.A1" office:value-type="string">
            <text:p text:style-name="P19">OS</text:p>
          </table:table-cell>
          <table:table-cell table:style-name="Table1.C1" office:value-type="string">
            <text:p text:style-name="P19">Why?</text:p>
          </table:table-cell>
        </table:table-row>
        <table:table-row table:style-name="Table1.1">
          <table:table-cell table:style-name="Table1.A2" office:value-type="string">
            <text:p text:style-name="P19">Service Server</text:p>
          </table:table-cell>
          <table:table-cell table:style-name="Table1.A2" office:value-type="string">
            <text:p text:style-name="P19">Ubuntu</text:p>
          </table:table-cell>
          <table:table-cell table:style-name="Table1.C2" office:value-type="string">
            <text:p text:style-name="P19">Industry Standard for web servers</text:p>
          </table:table-cell>
        </table:table-row>
        <table:table-row>
          <table:table-cell table:style-name="Table1.A2" office:value-type="string">
            <text:p text:style-name="P19">SIEM Server</text:p>
          </table:table-cell>
          <table:table-cell table:style-name="Table1.A2" office:value-type="string">
            <text:p text:style-name="P19">Debian</text:p>
          </table:table-cell>
          <table:table-cell table:style-name="Table1.C2" office:value-type="string">
            <text:p text:style-name="P19">Stable and LTS</text:p>
          </table:table-cell>
        </table:table-row>
        <table:table-row>
          <table:table-cell table:style-name="Table1.A2" office:value-type="string">
            <text:p text:style-name="P20">Client</text:p>
          </table:table-cell>
          <table:table-cell table:style-name="Table1.A2" office:value-type="string">
            <text:p text:style-name="P20">Windows 10</text:p>
          </table:table-cell>
          <table:table-cell table:style-name="Table1.C2" office:value-type="string">
            <text:p text:style-name="P20">Most clients use Windows</text:p>
          </table:table-cell>
        </table:table-row>
        <table:table-row>
          <table:table-cell table:style-name="Table1.A2" office:value-type="string">
            <text:p text:style-name="P20">Attacker</text:p>
          </table:table-cell>
          <table:table-cell table:style-name="Table1.A2" office:value-type="string">
            <text:p text:style-name="P20">Kali Linux</text:p>
          </table:table-cell>
          <table:table-cell table:style-name="Table1.C2" office:value-type="string">
            <text:p text:style-name="P20">Pre-loaded with tools</text:p>
          </table:table-cell>
        </table:table-row>
      </table:table>
      <text:p text:style-name="P21"/>
      <text:h text:style-name="P22" text:outline-level="1"><text:bookmark-start text:name="__RefHeading___Toc85_4060935862 Copy 1 Copy 1"/>Execution<text:bookmark-end text:name="__RefHeading___Toc85_4060935862 Copy 1 Copy 1"/></text:h>
      <text:h text:style-name="P23" text:outline-level="2"><text:bookmark-start text:name="__RefHeading___Toc1520_170000225"/>Getting the VMs to post<text:bookmark-end text:name="__RefHeading___Toc1520_170000225"/></text:h>
      <text:p text:style-name="P24"/>
      <text:p text:style-name="P25"><draw:frame draw:style-name="fr1" draw:name="Frame1" text:anchor-type="char" svg:x="0.004cm" svg:y="-0.43cm" svg:width="17.621cm" draw:z-index="0"><draw:text-box fo:min-height="2.563cm"><text:p text:style-name="Figure"><draw:frame draw:style-name="fr2" draw:name="Image1" text:anchor-type="paragraph" svg:x="0.032cm" svg:y="0.445cm" svg:width="17.59cm" style:rel-width="100%" svg:height="2.558cm" style:rel-height="scale" draw:z-index="1"><draw:image xlink:href="Pictures/10000001000001D30000004403DC35FA.png" xlink:type="simple" xlink:show="embed" xlink:actuate="onLoad" draw:mime-type="image/png"/></draw:frame>Figure <text:sequence text:ref-name="refFigure0" text:name="Figure" text:formula="ooow:Figure+1" style:num-format="1">1</text:sequence>: Creating of directories for vagrant files.</text:p></draw:text-box></draw:frame><text:span text:style-name="T5">Since I’m using Vagrant, I can use pre-made boxes I can find at the </text:span><text:a xlink:type="simple" xlink:href="https://portal.cloud.hashicorp.com/vagrant/discover" text:style-name="Internet_20_link" text:visited-style-name="Visited_20_Internet_20_Link"><text:span text:style-name="T5">Vagrant Public Registry</text:span></text:a><text:span text:style-name="T5">. Since I use libvirtd, I am seeking boxes that support that provider in particular.</text:span></text:p>
      <text:p text:style-name="P26"><draw:frame draw:style-name="fr3" draw:name="Frame2" text:anchor-type="char" svg:width="17.59cm" draw:z-index="2"><draw:text-box fo:min-height="5.323cm"><text:p text:style-name="Figure"><draw:frame draw:style-name="fr4" draw:name="Image2" text:anchor-type="paragraph" svg:width="17.59cm" style:rel-width="100%" svg:height="5.323cm" style:rel-height="scale" draw:z-index="3"><draw:image xlink:href="Pictures/10000001000003720000010B1EACE50F.png" xlink:type="simple" xlink:show="embed" xlink:actuate="onLoad" draw:mime-type="image/png"/></draw:frame>Figure <text:sequence text:ref-name="refFigure1" text:name="Figure" text:formula="ooow:Figure+1" style:num-format="1">2</text:sequence>: Vagrant downloading and setting up the image</text:p></draw:text-box></draw:frame></text:p>
      <text:p text:style-name="P26">Once the download is finished, the machine will boot on its own, and I will be able to access it through VMM (Virtual Machine Manager) from my work computer.</text:p>
      <text:p text:style-name="P26"/>
      <text:p text:style-name="P26"><draw:frame draw:style-name="fr5" draw:name="Image4" text:anchor-type="char" svg:width="16.244cm" svg:height="7.433cm" draw:z-index="5"><draw:image xlink:href="Pictures/1000000100000266000001198A605134.png" xlink:type="simple" xlink:show="embed" xlink:actuate="onLoad" draw:mime-type="image/png"/></draw:frame><draw:frame draw:style-name="fr6" draw:name="Image3" text:anchor-type="char" svg:x="1.441cm" svg:y="7.431cm" svg:width="14.707cm" svg:height="2.591cm" draw:z-index="4"><draw:image xlink:href="Pictures/100000010000022C00000062ADF6FCB1.png" xlink:type="simple" xlink:show="embed" xlink:actuate="onLoad" draw:mime-type="image/png"/><draw:contour-polygon svg:width="14.629cm" svg:height="2.513cm" svg:viewBox="0 0 14629 2513" draw:points="26,26 26,52 26,79 26,105 26,132 26,158 26,185 26,211 26,238 26,264 26,290 26,317 26,343 26,370 26,396 26,423 26,449 26,476 26,502 26,528 26,555 26,581 26,608 26,634 26,661 26,687 26,714 26,740 26,767 26,793 26,819 26,846 26,872 26,899 26,925 26,952 26,978 26,1005 26,1031 26,1057 26,1084 26,1110 26,1137 26,1163 26,1190 26,1216 26,1243 26,1269 26,1296 26,1322 26,1348 26,1375 26,1401 26,1428 26,1454 26,1481 26,1507 26,1534 26,1560 26,1586 26,1613 26,1639 26,1666 26,1692 26,1719 26,1745 26,1772 26,1798 26,1824 26,1851 26,1877 26,1904 26,1930 26,1957 26,1983 26,2010 26,2036 26,2063 26,2089 26,2115 26,2142 26,2168 26,2195 26,2221 26,2248 26,2274 26,2301 26,2327 26,2353 26,2380 26,2406 26,2433 26,2459 26,2486 26,2512 26,2539 14655,2539 14655,2512 14655,2486 14655,2459 14655,2433 14655,2406 14655,2380 14655,2353 14655,2327 14655,2301 14655,2274 14655,2248 14655,2221 14655,2195 14655,2168 14655,2142 14655,2115 14655,2089 14655,2063 14655,2036 14655,2010 14655,1983 14655,1957 14655,1930 14655,1904 14655,1877 14655,1851 14655,1824 14655,1798 14655,1772 14655,1745 14655,1719 14655,1692 14655,1666 14655,1639 14655,1613 14655,1586 14655,1560 14655,1534 14655,1507 14655,1481 14655,1454 14655,1428 14655,1401 14655,1375 14655,1348 14655,1322 14655,1296 14655,1269 14655,1243 14655,1216 14655,1190 14655,1163 14655,1137 14655,1110 14655,1084 14655,1057 14655,1031 14655,1005 14655,978 14655,952 14655,925 14655,899 14655,872 14655,846 14655,819 14655,793 14655,767 14655,740 14655,714 14655,687 14655,661 14655,634 14655,608 14655,581 14655,555 14655,528 14655,502 14655,476 14655,449 14655,423 14655,396 14655,370 14655,343 14655,317 14655,290 14655,264 14655,238 14655,211 14655,185 14655,158 14655,132 14655,105 14655,79 14655,52 14655,26" draw:recreate-on-edit="true"/></draw:frame><text:soft-page-break/></text:p>
      <text:p text:style-name="P27"/>
      <text:p text:style-name="P27"/>
      <text:p text:style-name="P28">I just have to repeat these steps for the three other OSes now.</text:p>
      <text:h text:style-name="P29" text:outline-level="2"><text:bookmark-start text:name="__RefHeading___Toc1600_170000225"/>Networking<text:bookmark-end text:name="__RefHeading___Toc1600_170000225"/></text:h>
      <text:p text:style-name="P30">Now that all my machines are up and running, I must ensure they can locally reach other while being in their own LAN (as in not be in my home Local LAN). <text:span text:style-name="T6">Here’s the XML for my custom LAN network.</text:span></text:p>
      <text:p text:style-name="P31">&lt;network&gt;</text:p>
      <text:p text:style-name="P31"><text:s text:c="2"/>&lt;name&gt;lan&lt;/name&gt;</text:p>
      <text:p text:style-name="P31"><text:s text:c="2"/>&lt;forward mode="nat"/&gt;</text:p>
      <text:p text:style-name="P31"><text:s text:c="2"/>&lt;bridge name="virbr1" stp="on" delay="0"/&gt;</text:p>
      <text:p text:style-name="P31"><text:s text:c="2"/>&lt;ip address="192.168.100.1" netmask="255.255.255.0"&gt;</text:p>
      <text:p text:style-name="P31"><text:s text:c="4"/>&lt;dhcp&gt;</text:p>
      <text:p text:style-name="P31"><text:s text:c="6"/>&lt;range start="192.168.100.100" end="192.168.100.200"/&gt;</text:p>
      <text:p text:style-name="P31"><text:s text:c="4"/>&lt;/dhcp&gt;</text:p>
      <text:p text:style-name="P31"><text:s text:c="2"/>&lt;/ip&gt;</text:p>
      <text:p text:style-name="P31"><text:soft-page-break/>&lt;/network&gt;</text:p>
      <text:p text:style-name="P32">I need to assign the machine<text:span text:style-name="T7">s</text:span> to the <text:span text:style-name="T7">right network bridge</text:span> now.</text:p>
      <text:p text:style-name="P33"><draw:frame draw:style-name="fr7" draw:name="Image5" text:anchor-type="char" svg:x="3.103cm" svg:y="0.661cm" svg:width="11.058cm" svg:height="8.306cm" draw:z-index="6"><draw:image xlink:href="Pictures/10000001000001A20000013ACF1A741F.png" xlink:type="simple" xlink:show="embed" xlink:actuate="onLoad" draw:mime-type="image/png"/></draw:frame></text:p>
      <text:p text:style-name="P33">And finally, allow the bridge to be built by QEMU.</text:p>
      <text:p text:style-name="P33"><draw:frame draw:style-name="fr7" draw:name="Image6" text:anchor-type="char" svg:x="1.561cm" svg:y="0.254cm" svg:width="14.469cm" svg:height="4.126cm" draw:z-index="7"><draw:image xlink:href="Pictures/10000001000002230000009C4CEF0992.png" xlink:type="simple" xlink:show="embed" xlink:actuate="onLoad" draw:mime-type="image/png"/></draw:frame></text:p>
      <text:p text:style-name="P33"/>
      <text:p text:style-name="P33"/>
      <text:p text:style-name="P33"/>
      <text:p text:style-name="P33"/>
      <text:p text:style-name="P33"/>
      <text:p text:style-name="P33"/>
      <text:p text:style-name="P33"><text:soft-page-break/>And we’ve got our network.</text:p>
      <text:p text:style-name="P33"/>
      <text:p text:style-name="P33"><draw:frame draw:style-name="fr8" draw:name="Image7" text:anchor-type="char" svg:x="0cm" svg:y="-0.078cm" svg:width="17.59cm" svg:height="8.077cm" draw:z-index="8"><draw:image xlink:href="Pictures/1000000100000615000002CB02C0A039.png" xlink:type="simple" xlink:show="embed" xlink:actuate="onLoad" draw:mime-type="image/png"/></draw:frame></text:p>
      <text:h text:style-name="P34" text:outline-level="2"><text:bookmark-start text:name="__RefHeading___Toc1602_170000225"/>Web Server <text:span text:style-name="T8">Dummy Setup</text:span><text:bookmark-end text:name="__RefHeading___Toc1602_170000225"/></text:h>
      <text:p text:style-name="P35">For the Ubuntu machine, I will setup a base HTTP-only NGINX service. It is rather simple <text:span text:style-name="T9">in concept</text:span>. I changed the NGINX config to show a dummy page and started the service.</text:p>
      <text:p text:style-name="P35"/>
      <text:p text:style-name="P36">I ran into a permission issue because I decided to write HTML code under a /home/ folder, but I was able to get through it.</text:p>
      <text:h text:style-name="P37" text:outline-level="2"><text:bookmark-start text:name="__RefHeading___Toc1604_170000225"/>SIEM Server Splunk Initial Setup<text:bookmark-end text:name="__RefHeading___Toc1604_170000225"/></text:h>
      <text:p text:style-name="P36">I’ll be using the trial of Splunk Enterprise for now. I am aware of its data limitation of 500MB or so, but I will deal with it once the problem arises. <text:span text:style-name="T10">The password for the admin user will be VagrantMachine.</text:span></text:p>
      <text:p text:style-name="P36"/>
      <text:p text:style-name="P36">...<text:span text:style-name="T10">aaaand we are in!</text:span></text:p>
      <text:p text:style-name="P38"><draw:frame draw:style-name="fr7" draw:name="Image8" text:anchor-type="char" svg:x="0cm" svg:y="0.385cm" svg:width="17.59cm" svg:height="13.212cm" draw:z-index="9"><draw:image xlink:href="Pictures/10000001000004EE000003B4D13F74D1.png" xlink:type="simple" xlink:show="embed" xlink:actuate="onLoad" draw:mime-type="image/png"/></draw:frame><text:soft-page-break/></text:p>
      <text:p text:style-name="P38">There was no firewall on the Debian machine (we’ll have to fix that in another report), and Splunk listened from all available interfaces for the web interfaces, so I just accessed it from another machine on the virtual LAN: the attacking machine.</text:p>
      <text:h text:style-name="P39" text:outline-level="2"/>
      <text:p text:style-name="P40"/>
      <text:p text:style-name="P40"/>
      <text:p text:style-name="P40"/>
      <text:p text:style-name="P40"/>
      <text:h text:style-name="P39" text:outline-level="2"><text:bookmark-start text:name="__RefHeading___Toc1604_170000225 Copy 1"/><text:soft-page-break/>Forwarding Logs<text:bookmark-end text:name="__RefHeading___Toc1604_170000225 Copy 1"/></text:h>
      <text:p text:style-name="P40">Our SIEM server will be listening on port 9997 for logs.</text:p>
      <text:p text:style-name="P40"><draw:frame draw:style-name="fr8" draw:name="Image9" text:anchor-type="char" svg:x="0cm" svg:y="0.385cm" svg:width="17.59cm" svg:height="13.212cm" draw:z-index="10"><draw:image xlink:href="Pictures/10000001000004EE000003B439EB74EC.png" xlink:type="simple" xlink:show="embed" xlink:actuate="onLoad" draw:mime-type="image/png"/></draw:frame><draw:frame draw:style-name="fr9" draw:name="Image13" text:anchor-type="char" svg:width="17.59cm" svg:height="13.21cm" draw:z-index="14"><draw:image xlink:href="Pictures/10000001000004E9000003B098CE7D4F.png" xlink:type="simple" xlink:show="embed" xlink:actuate="onLoad" draw:mime-type="image/png"/></draw:frame></text:p>
      <text:p text:style-name="P40"/>
      <text:p text:style-name="P40"/>
      <text:p text:style-name="P40"/>
      <text:p text:style-name="P40"/>
      <text:p text:style-name="P40"/>
      <text:p text:style-name="P40"/>
      <text:p text:style-name="P40"><text:soft-page-break/>We must install Splunk Forwarder on the web server and the Windows 10 client, <text:span text:style-name="T11">and then tell them what to send.</text:span></text:p>
      <text:p text:style-name="P41"><draw:frame draw:style-name="fr8" draw:name="Image10" text:anchor-type="char" svg:x="0cm" svg:y="0.453cm" svg:width="17.59cm" svg:height="13.573cm" draw:z-index="11"><draw:image xlink:href="Pictures/10000001000003DE000002FC230C1469.png" xlink:type="simple" xlink:show="embed" xlink:actuate="onLoad" draw:mime-type="image/png"/></draw:frame></text:p>
      <text:p text:style-name="P41"/>
      <text:p text:style-name="P41"/>
      <text:p text:style-name="P41"/>
      <text:p text:style-name="P41"/>
      <text:p text:style-name="P42"/>
      <text:p text:style-name="P42"/>
      <text:p text:style-name="P42"><draw:frame draw:style-name="fr10" draw:name="Image11" text:anchor-type="char" svg:width="17.59cm" svg:height="13.573cm" draw:z-index="12"><draw:image xlink:href="Pictures/10000001000003DE000002FC4D9BB4D1.png" xlink:type="simple" xlink:show="embed" xlink:actuate="onLoad" draw:mime-type="image/png"/></draw:frame><text:soft-page-break/>I had actually forgotten to create the indexes I was pointing to in the inputs.conf, so I was not getting any logs. I troubleshooted for a dozen of minutes thinking it was something wrong with my network, but nope. Always create the indexes in advance, or else the logs will not be registered.</text:p>
      <text:p text:style-name="P42"/>
      <text:p text:style-name="P42"/>
      <text:p text:style-name="P42"/>
      <text:p text:style-name="P42"/>
      <text:p text:style-name="P42"/>
      <text:p text:style-name="P42"><draw:frame draw:style-name="fr8" draw:name="Image12" text:anchor-type="char" svg:x="0cm" svg:y="0.415cm" svg:width="17.59cm" svg:height="13.21cm" draw:z-index="13"><draw:image xlink:href="Pictures/10000001000004E9000003B098CE7D4F.png" xlink:type="simple" xlink:show="embed" xlink:actuate="onLoad" draw:mime-type="image/png"/></draw:frame><text:soft-page-break/></text:p>
      <text:p text:style-name="P42">So there we have it now. Two machines sending their logs to our SIEM server! This is only the very start of my adventure with this setup, and I hope you will read my other reports to see where I go from here.</text:p>
      <text:h text:style-name="P43" text:outline-level="1" text:is-list-header="true">Conclusion</text:h>
      <text:p text:style-name="P42">I have done something similar in the past in college, but this is my first time setting it up from scratch myself on my home lab. I’m pretty happy with what I’ve learned while writing this report: more virsh, KVM XML, and to configure indexes BEFORE trying to fill them.</text:p>
      <text:p text:style-name="P44"><text:soft-page-break/>My next idea is to pen-test my own web server, and see how traceable I will be through the logs. Afterwards, I can recognize attack patterns and create alerts based on that... and eventually, set up a SOAR system. So much LAB potential with these babies... it makes my head sp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Mono" svg:font-family="'Bitstream Vera Sans Mono'" style:font-family-generic="modern" style:font-pitch="fixed"/>
    <style:font-face style:name="Bitstream Vera Sans Mono1" svg:font-family="'Bitstream Vera Sans Mono'" style:font-adornments="Bold" style:font-family-generic="modern" style:font-pitch="fixed"/>
    <style:font-face style:name="Bitstream Vera Sans Mono2" svg:font-family="'Bitstream Vera Sans Mono'" style:font-adornments="Roman"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Bitstream Vera Sans Mono" fo:font-family="'Bitstream Vera Sans Mono'" style:font-family-generic="modern" style:font-pitch="fixed" officeooo:rsid="001d2193"/>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line-height="100%" fo:text-indent="0cm" style:auto-text-indent="false" text:number-lines="false" text:line-number="0"/>
      <style:text-properties style:font-name="Bitstream Vera Sans Mono1" fo:font-family="'Bitstream Vera Sans Mono'" style:font-style-name="Bold" style:font-family-generic="modern" style:font-pitch="fixed"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Bitstream Vera Sans Mono" fo:font-family="'Bitstream Vera Sans Mono'" style:font-family-generic="modern" style:font-pitch="fixed" fo:font-size="22pt" fo:font-weight="bold" officeooo:rsid="001a7a8b" style:font-size-asian="22pt" style:font-weight-asian="bold" style:font-size-complex="22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text-properties style:font-name="Bitstream Vera Sans Mono2" fo:font-family="'Bitstream Vera Sans Mono'" style:font-style-name="Roman" style:font-family-generic="modern" style:font-pitch="fixe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Bitstream Vera Sans Mono" fo:font-family="'Bitstream Vera Sans Mono'" style:font-family-generic="modern" style:font-pitch="fixed" fo:font-size="16pt" fo:font-weight="bold" officeooo:rsid="001a7a8b"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itstream Vera Sans Mono" officeooo:paragraph-rsid="0016a50f"/>
    </style:style>
    <style:style style:name="MP2" style:family="paragraph" style:parent-style-name="Text_20_body">
      <style:paragraph-properties fo:text-align="center" style:justify-single-word="false"/>
      <style:text-properties style:font-name="Bitstream Vera Sans Mono" officeooo:rsid="0016a50f" officeooo:paragraph-rsid="0016a50f"/>
    </style:style>
    <style:style style:name="MP3" style:family="paragraph" style:parent-style-name="Text_20_body">
      <style:paragraph-properties fo:text-align="center" style:justify-single-word="false"/>
      <style:text-properties style:font-name="Bitstream Vera Sans Mono" officeooo:rsid="00185b33" officeooo:paragraph-rsid="00185b33"/>
    </style:style>
    <style:style style:name="MT1" style:family="text">
      <style:text-properties officeooo:rsid="00210135"/>
    </style:style>
    <style:style style:name="MT2" style:family="text">
      <style:text-properties officeooo:rsid="001d219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PLUNK LABS ENV W-U</text:span><text:tab/><text:tab/><text:page-number style:num-format="1" text:select-page="current">14</text:page-number></text:p>
      </style:header>
      <style:header-first>
        <text:p text:style-name="Header_20_left"/>
      </style:header-first>
      <style:footer>
        <text:p text:style-name="MP2">aeroraph.dev // raphael@aeroraph.dev</text:p>
      </style:footer>
      <style:footer-first>
        <text:p text:style-name="MP3"><text:span text:style-name="MT2">22</text:span> <text:span text:style-name="MT2">APR</text:span> 20<text:span text:style-name="MT2">26</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2T22:34:34.082519761</meta:creation-date>
    <meta:editing-duration>PT25M2S</meta:editing-duration>
    <meta:editing-cycles>6</meta:editing-cycles>
    <meta:generator>LibreOffice/26.2.2.2$Linux_X86_64 LibreOffice_project/1f77d10d6938fd34972958f64b2bcfa54f8b1ba5</meta:generator>
    <dc:date>2026-04-23T02:30:02.941230308</dc:date>
    <meta:document-statistic meta:table-count="1" meta:image-count="13" meta:object-count="0" meta:page-count="14" meta:paragraph-count="94" meta:word-count="929" meta:character-count="5297" meta:non-whitespace-character-count="4443"/>
  </office:meta>
</office:document-meta>
</file>