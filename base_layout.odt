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Bitstream Vera Sans Mono" officeooo:rsid="0016a50f" officeooo:paragraph-rsid="0016a50f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P3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fo:font-style="italic" officeooo:rsid="0016a50f" officeooo:paragraph-rsid="0016a50f" style:font-style-asian="italic" style:font-style-complex="italic"/>
    </style:style>
    <style:style style:name="P5" style:family="paragraph" style:parent-style-name="Contents_20_Heading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officeooo:rsid="001a7a8b" officeooo:paragraph-rsid="001a7a8b"/>
    </style:style>
    <style:style style:name="P9" style:family="paragraph" style:parent-style-name="Text_20_body">
      <style:text-properties officeooo:paragraph-rsid="001a7a8b"/>
    </style:style>
    <style:style style:name="P10" style:family="paragraph" style:parent-style-name="Text_20_body">
      <style:text-properties officeooo:rsid="0018b838"/>
    </style:style>
    <style:style style:name="P11" style:family="paragraph" style:parent-style-name="Heading_20_1">
      <style:paragraph-properties fo:break-before="page"/>
      <style:text-properties officeooo:rsid="001a7a8b" officeooo:paragraph-rsid="001a7a8b"/>
    </style:style>
    <style:style style:name="P12" style:family="paragraph" style:parent-style-name="Heading_20_2">
      <style:text-properties officeooo:paragraph-rsid="001a7a8b"/>
    </style:style>
    <style:style style:name="T1" style:family="text">
      <style:text-properties officeooo:rsid="001a7a8b"/>
    </style:style>
    <style:style style:name="Sect1" style:family="section">
      <style:section-properties style:editable="false">
        <style:columns fo:column-count="1" fo:column-gap="0cm">
          <style:column-sep style:width="0.009cm" style:color="#000000" style:height="100%" style:style="dotted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IC SECURITY</text:p>
      <text:p text:style-name="P2">Write-Up</text:p>
      <text:p text:style-name="P3"><text:bookmark-start text:name="__RefHeading___Toc2_4060935862"/>by Raphael Beauregard<text:bookmark-end text:name="__RefHeading___Toc2_406093586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[XYZ LAB OR ABC ANALYSIS]</text:p>
      <text:p text:style-name="P4">Doing something for some rea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Contents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h text:style-name="Heading_20_1" text:outline-level="1"><text:soft-page-break/>Table of Contents</text:h>
          </text:index-title>
          <text:p text:style-name="P5"><text:a xlink:type="simple" xlink:href="#__RefHeading___Toc85_4060935862" office:name="Goal" text:style-name="Index_20_Link" text:visited-style-name="Index_20_Link">Goal<text:tab/>3</text:a></text:p>
          <text:p text:style-name="P6"><text:a xlink:type="simple" xlink:href="#__RefHeading___Toc898_170000225" office:name="Objective" text:style-name="Index_20_Link" text:visited-style-name="Index_20_Link">Objective<text:tab/>3</text:a></text:p>
          <text:p text:style-name="P6"><text:a xlink:type="simple" xlink:href="#__RefHeading___Toc292_4060935862" office:name="Considerations" text:style-name="Index_20_Link" text:visited-style-name="Index_20_Link">Considerations<text:tab/>3</text:a></text:p>
          <text:p text:style-name="P6"><text:a xlink:type="simple" xlink:href="#__RefHeading___Toc292_4060935862%20Copy%201" office:name="Expectations" text:style-name="Index_20_Link" text:visited-style-name="Index_20_Link">Expectations<text:tab/>3</text:a></text:p>
          <text:p text:style-name="P5"><text:a xlink:type="simple" xlink:href="#__RefHeading___Toc85_4060935862%20Copy%201" office:name="Methodology" text:style-name="Index_20_Link" text:visited-style-name="Index_20_Link">Methodology<text:tab/>4</text:a></text:p>
          <text:p text:style-name="P6"><text:a xlink:type="simple" xlink:href="#__RefHeading___Toc898_170000225%20Copy%201" office:name="Tools" text:style-name="Index_20_Link" text:visited-style-name="Index_20_Link">Tools<text:tab/>4</text:a></text:p>
          <text:p text:style-name="P5"><text:a xlink:type="simple" xlink:href="#__RefHeading___Toc85_4060935862%20Copy%201%20Copy%201" office:name="Execution" text:style-name="Index_20_Link" text:visited-style-name="Index_20_Link">Execution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bookmark-start text:name="__RefHeading___Toc85_4060935862"/>Goal<text:bookmark-end text:name="__RefHeading___Toc85_4060935862"/></text:h>
      <text:h text:style-name="P8" text:outline-level="2"><text:bookmark-start text:name="__RefHeading___Toc898_170000225"/>Objective<text:bookmark-end text:name="__RefHeading___Toc898_170000225"/></text:h>
      <text:p text:style-name="P9"/>
      <text:p text:style-name="P10"/>
      <text:h text:style-name="P8" text:outline-level="2"><text:bookmark-start text:name="__RefHeading___Toc292_4060935862"/>Considerations<text:bookmark-end text:name="__RefHeading___Toc292_4060935862"/></text:h>
      <text:p text:style-name="P9"/>
      <text:p text:style-name="P9"/>
      <text:p text:style-name="P9"/>
      <text:h text:style-name="P8" text:outline-level="2"><text:bookmark-start text:name="__RefHeading___Toc292_4060935862 Copy 1"/>Expectations<text:bookmark-end text:name="__RefHeading___Toc292_4060935862 Copy 1"/></text:h>
      <text:p text:style-name="P9"/>
      <text:h text:style-name="P11" text:outline-level="1"><text:bookmark-start text:name="__RefHeading___Toc85_4060935862 Copy 1"/>Methodology<text:bookmark-end text:name="__RefHeading___Toc85_4060935862 Copy 1"/></text:h>
      <text:h text:style-name="P12" text:outline-level="2"><text:bookmark-start text:name="__RefHeading___Toc898_170000225 Copy 1"/><text:span text:style-name="T1">Tools</text:span><text:bookmark-end text:name="__RefHeading___Toc898_170000225 Copy 1"/></text:h>
      <text:h text:style-name="P11" text:outline-level="1"><text:bookmark-start text:name="__RefHeading___Toc85_4060935862 Copy 1 Copy 1"/>Execution<text:bookmark-end text:name="__RefHeading___Toc85_4060935862 Copy 1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Bold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line-height="100%" fo:text-indent="0cm" style:auto-text-indent="false" text:number-lines="false" text:line-number="0"/>
      <style:text-properties style:font-name="Bitstream Vera Sans Mono1" fo:font-family="'Bitstream Vera Sans Mono'" style:font-style-name="Bold" style:font-family-generic="modern" style:font-pitch="fixed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Bitstream Vera Sans Mono" fo:font-family="'Bitstream Vera Sans Mono'" style:font-family-generic="modern" style:font-pitch="fixed" fo:font-size="22pt" fo:font-weight="bold" officeooo:rsid="001a7a8b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Bitstream Vera Sans Mono2" fo:font-family="'Bitstream Vera Sans Mono'" style:font-style-name="Roman" style:font-family-generic="modern" style:font-pitch="fixe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Bitstream Vera Sans Mono" fo:font-family="'Bitstream Vera Sans Mono'" style:font-family-generic="modern" style:font-pitch="fixed" fo:font-size="16pt" fo:font-weight="bold" officeooo:rsid="001a7a8b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itstream Vera Sans Mono" officeooo:paragraph-rsid="0016a50f"/>
    </style:style>
    <style:style style:name="MP2" style:family="paragraph" style:parent-style-name="Text_20_body">
      <style:paragraph-properties fo:text-align="center" style:justify-single-word="false"/>
      <style:text-properties style:font-name="Bitstream Vera Sans Mono" officeooo:rsid="0016a50f" officeooo:paragraph-rsid="0016a50f"/>
    </style:style>
    <style:style style:name="MP3" style:family="paragraph" style:parent-style-name="Text_20_body">
      <style:paragraph-properties fo:text-align="center" style:justify-single-word="false"/>
      <style:text-properties style:font-name="Bitstream Vera Sans Mono" officeooo:rsid="00185b33" officeooo:paragraph-rsid="00185b33"/>
    </style:style>
    <style:style style:name="MT1" style:family="text">
      <style:text-properties officeooo:rsid="0016a50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ENERIC SECURITY W-U</text:span><text:tab/><text:tab/><text:page-number style:num-format="1" text:select-page="current">5</text:page-number></text:p>
      </style:header>
      <style:header-first>
        <text:p text:style-name="Header_20_left"/>
      </style:header-first>
      <style:footer>
        <text:p text:style-name="MP2">aeroraph.dev // raphael@aeroraph.dev</text:p>
      </style:footer>
      <style:footer-first>
        <text:p text:style-name="MP3">XX MONTH 20XX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2:34:34.082519761</meta:creation-date>
    <meta:editing-duration>PT11S</meta:editing-duration>
    <meta:editing-cycles>2</meta:editing-cycles>
    <meta:generator>LibreOffice/26.2.2.2$Linux_X86_64 LibreOffice_project/1f77d10d6938fd34972958f64b2bcfa54f8b1ba5</meta:generator>
    <dc:date>2026-04-22T22:45:35.515953639</dc:date>
    <meta:document-statistic meta:table-count="0" meta:image-count="0" meta:object-count="0" meta:page-count="5" meta:paragraph-count="23" meta:word-count="50" meta:character-count="332" meta:non-whitespace-character-count="304"/>
  </office:meta>
</office:document-meta>
</file>